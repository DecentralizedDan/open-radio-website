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7.5in" fo:margin-top="0in" fo:margin-bottom="0in" table:align="margins" style:writing-mode="lr-tb"/>
    </style:style>
    <style:style style:name="Table2.A" style:family="table-column">
      <style:table-column-properties style:column-width="1.0715in" style:rel-column-width="9361*"/>
    </style:style>
    <style:style style:name="Table2.B" style:family="table-column">
      <style:table-column-properties style:column-width="1.0167in" style:rel-column-width="8885*"/>
    </style:style>
    <style:style style:name="Table2.C" style:family="table-column">
      <style:table-column-properties style:column-width="0.9472in" style:rel-column-width="8275*"/>
    </style:style>
    <style:style style:name="Table2.D" style:family="table-column">
      <style:table-column-properties style:column-width="1.25in" style:rel-column-width="10922*"/>
    </style:style>
    <style:style style:name="Table2.E" style:family="table-column">
      <style:table-column-properties style:column-width="1.1986in" style:rel-column-width="10474*"/>
    </style:style>
    <style:style style:name="Table2.F" style:family="table-column">
      <style:table-column-properties style:column-width="1.1569in" style:rel-column-width="10110*"/>
    </style:style>
    <style:style style:name="Table2.G" style:family="table-column">
      <style:table-column-properties style:column-width="0.859in" style:rel-column-width="7508*"/>
    </style:style>
    <style:style style:name="Table2.A1" style:family="table-cell">
      <style:table-cell-properties fo:padding-left="0in" fo:padding-right="0in" fo:padding-top="0.0201in" fo:padding-bottom="0.0201in" fo:border="none" style:writing-mode="page"/>
    </style:style>
    <style:style style:name="Table2.4" style:family="table-row">
      <style:table-row-properties style:min-row-height="0.2806in"/>
    </style:style>
    <style:style style:name="Table1" style:family="table">
      <style:table-properties style:width="7.5in" fo:margin-top="0in" fo:margin-bottom="0in" table:align="margins" style:writing-mode="lr-tb"/>
    </style:style>
    <style:style style:name="Table1.A" style:family="table-column">
      <style:table-column-properties style:column-width="1.0715in" style:rel-column-width="9361*"/>
    </style:style>
    <style:style style:name="Table1.B" style:family="table-column">
      <style:table-column-properties style:column-width="1.0167in" style:rel-column-width="8885*"/>
    </style:style>
    <style:style style:name="Table1.C" style:family="table-column">
      <style:table-column-properties style:column-width="0.9472in" style:rel-column-width="8275*"/>
    </style:style>
    <style:style style:name="Table1.D" style:family="table-column">
      <style:table-column-properties style:column-width="1.25in" style:rel-column-width="10922*"/>
    </style:style>
    <style:style style:name="Table1.E" style:family="table-column">
      <style:table-column-properties style:column-width="1.1986in" style:rel-column-width="10474*"/>
    </style:style>
    <style:style style:name="Table1.F" style:family="table-column">
      <style:table-column-properties style:column-width="1.1569in" style:rel-column-width="10110*"/>
    </style:style>
    <style:style style:name="Table1.G" style:family="table-column">
      <style:table-column-properties style:column-width="0.859in" style:rel-column-width="7508*"/>
    </style:style>
    <style:style style:name="Table1.A1" style:family="table-cell">
      <style:table-cell-properties fo:padding-left="0in" fo:padding-right="0in" fo:padding-top="0.0201in" fo:padding-bottom="0.0201in" fo:border="none" style:writing-mode="page"/>
    </style:style>
    <style:style style:name="Table1.4" style:family="table-row">
      <style:table-row-properties style:min-row-height="0.2806in"/>
    </style:style>
    <style:style style:name="P1" style:family="paragraph" style:parent-style-name="Text_20_body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Helvetica" fo:font-size="24pt" fo:font-style="normal" style:text-underline-style="none" fo:font-weight="bold" officeooo:rsid="00494ce8" officeooo:paragraph-rsid="00494ce8" style:text-blinking="false" fo:background-color="transparent" style:font-size-asian="24pt" style:font-size-complex="24pt"/>
    </style:style>
    <style:style style:name="P2" style:family="paragraph" style:parent-style-name="Text_20_body">
      <style:paragraph-properties fo:margin-top="0in" fo:margin-bottom="0in" style:contextual-spacing="false"/>
      <style:text-properties style:font-name="Helvetica" fo:font-size="16pt" officeooo:paragraph-rsid="00451039" style:font-size-asian="16pt" style:font-size-complex="16pt"/>
    </style:style>
    <style:style style:name="P3" style:family="paragraph" style:parent-style-name="Text_20_body">
      <style:text-properties style:font-name="Helvetica" fo:font-size="16pt" fo:font-weight="bold" officeooo:paragraph-rsid="00451039" style:font-size-asian="16pt" style:font-weight-asian="bold" style:font-size-complex="16pt" style:font-weight-complex="bold"/>
    </style:style>
    <style:style style:name="P4" style:family="paragraph" style:parent-style-name="Text_20_body" style:list-style-name="L1">
      <style:paragraph-properties fo:line-height="115%"/>
      <style:text-properties style:font-name="Helvetica" fo:font-size="16pt" officeooo:paragraph-rsid="00451039" style:font-size-asian="16pt" style:font-size-complex="16pt"/>
    </style:style>
    <style:style style:name="P5" style:family="paragraph" style:parent-style-name="Text_20_body" style:list-style-name="Numbering_20_abc">
      <style:paragraph-properties fo:line-height="115%"/>
      <style:text-properties style:font-name="Helvetica" fo:font-size="16pt" officeooo:paragraph-rsid="00451039" style:font-size-asian="16pt" style:font-size-complex="16pt"/>
    </style:style>
    <style:style style:name="P6" style:family="paragraph" style:parent-style-name="Text_20_body">
      <style:paragraph-properties fo:line-height="115%"/>
      <style:text-properties style:font-name="Helvetica" fo:font-size="16pt" officeooo:paragraph-rsid="00451039" style:font-size-asian="16pt" style:font-size-complex="16pt"/>
    </style:style>
    <style:style style:name="P7" style:family="paragraph" style:parent-style-name="Text_20_body">
      <style:paragraph-properties fo:line-height="115%"/>
      <style:text-properties style:font-name="Helvetica" fo:font-size="16pt" fo:font-weight="bold" officeooo:paragraph-rsid="00451039" style:font-size-asian="16pt" style:font-weight-asian="bold" style:font-size-complex="16pt" style:font-weight-complex="bold"/>
    </style:style>
    <style:style style:name="P8" style:family="paragraph" style:parent-style-name="Text_20_body">
      <style:text-properties style:font-name="Helvetica" fo:font-size="16pt" officeooo:paragraph-rsid="00451039" style:font-size-asian="16pt" style:font-size-complex="16pt"/>
    </style:style>
    <style:style style:name="P9" style:family="paragraph" style:parent-style-name="Text_20_body">
      <style:paragraph-properties fo:margin-left="0in" fo:margin-right="0in" fo:margin-top="0in" fo:margin-bottom="0.0835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Helvetica" fo:font-size="20pt" fo:font-style="normal" style:text-underline-style="none" fo:font-weight="bold" officeooo:rsid="004334ae" officeooo:paragraph-rsid="00451039" style:text-blinking="false" fo:background-color="transparent" style:font-size-asian="20pt" style:font-size-complex="20pt"/>
    </style:style>
    <style:style style:name="P10" style:family="paragraph" style:parent-style-name="Text_20_body">
      <loext:graphic-properties draw:fill="none" draw:fill-color="#ffffff"/>
      <style:paragraph-properties fo:margin-left="0in" fo:margin-right="0in" fo:margin-top="0.0201in" fo:margin-bottom="0.0201in" style:contextual-spacing="false" fo:line-height="10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Helvetica" fo:font-size="16pt" fo:font-style="normal" style:text-underline-style="none" fo:font-weight="bold" officeooo:paragraph-rsid="00451039" style:text-blinking="false" fo:background-color="transparent" style:font-size-asian="16pt" style:font-size-complex="16pt"/>
    </style:style>
    <style:style style:name="P11" style:family="paragraph" style:parent-style-name="Text_20_body">
      <loext:graphic-properties draw:fill="none" draw:fill-color="#ffffff"/>
      <style:paragraph-properties fo:margin-left="0in" fo:margin-right="0in" fo:margin-top="0.0201in" fo:margin-bottom="0.0201in" style:contextual-spacing="false" fo:line-height="115%" fo:text-indent="0in" style:auto-text-indent="false" fo:background-color="transparent" fo:padding="0in" fo:border="none" style:writing-mode="lr-tb"/>
      <style:text-properties style:font-name="Helvetica" fo:font-size="16pt" officeooo:paragraph-rsid="00451039" style:font-size-asian="16pt" style:font-size-complex="16pt"/>
    </style:style>
    <style:style style:name="P12" style:family="paragraph" style:parent-style-name="Text_20_body">
      <loext:graphic-properties draw:fill-color="#ffffff"/>
      <style:paragraph-properties fo:margin-left="0in" fo:margin-right="0in" fo:margin-top="0.0201in" fo:margin-bottom="0.0201in" style:contextual-spacing="false" fo:line-height="115%" fo:orphans="0" fo:widows="0" fo:text-indent="0in" style:auto-text-indent="false" style:writing-mode="lr-tb"/>
      <style:text-properties style:font-name="Helvetica" fo:font-size="16pt" officeooo:paragraph-rsid="00451039" style:font-size-asian="16pt" style:font-size-complex="16pt"/>
    </style:style>
    <style:style style:name="P13" style:family="paragraph" style:parent-style-name="Text_20_body">
      <style:paragraph-properties fo:margin-left="0in" fo:margin-right="0in" fo:margin-top="0in" fo:margin-bottom="0.0835in" style:contextual-spacing="false" fo:line-height="120%" fo:text-align="center" style:justify-single-word="false" fo:text-indent="0in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Helvetica" fo:font-size="20pt" fo:font-style="normal" style:text-underline-style="none" fo:font-weight="bold" officeooo:rsid="004334ae" officeooo:paragraph-rsid="00451039" style:text-blinking="false" fo:background-color="transparent" style:font-size-asian="20pt" style:font-size-complex="20pt"/>
    </style:style>
    <style:style style:name="P14" style:family="paragraph" style:parent-style-name="Text_20_body">
      <loext:graphic-properties draw:fill-color="#ffffff"/>
      <style:paragraph-properties fo:margin-left="0in" fo:margin-right="0in" fo:margin-top="0.0201in" fo:margin-bottom="0.0201in" style:contextual-spacing="false" fo:line-height="115%" fo:orphans="0" fo:widows="0" fo:text-indent="0in" style:auto-text-indent="false" style:writing-mode="lr-tb"/>
      <style:text-properties style:font-name="Helvetica" fo:font-size="16pt" officeooo:paragraph-rsid="00468b41" style:font-size-asian="16pt" style:font-size-complex="16pt"/>
    </style:style>
    <style:style style:name="T1" style:family="text">
      <style:text-properties officeooo:rsid="0038ae34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5e28a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781d1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8ae34" style:text-blinking="false" fo:background-color="transparent" loext:char-shading-value="0"/>
    </style:style>
    <style:style style:name="T7" style:family="text">
      <style:text-properties officeooo:rsid="00364768"/>
    </style:style>
    <style:style style:name="T8" style:family="text">
      <style:text-properties officeooo:rsid="003a99d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64768" style:text-blinking="false" fo:background-color="transparent" loext:char-shading-value="0"/>
    </style:style>
    <style:style style:name="T10" style:family="text">
      <style:text-properties officeooo:rsid="003601b0"/>
    </style:style>
    <style:style style:name="T11" style:family="text">
      <style:text-properties officeooo:rsid="003f2342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601b0" style:text-blinking="false" fo:background-color="transparent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c86c2" style:font-weight-asian="bold" style:font-weight-complex="bold"/>
    </style:style>
    <style:style style:name="T15" style:family="text">
      <style:text-properties officeooo:rsid="001c86c2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468b41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4334ae" style:text-blinking="false" fo:background-color="transparent" loext:char-shading-value="0"/>
    </style:style>
    <text:list-style style:name="L1">
      <text:list-level-style-number text:level="1" text:style-name="Character_5f_20_5f_style" loext:num-list-format="%1%." style:num-suffix="." style:num-format="1">
        <style:list-level-properties text:space-before="0.1in" text:min-label-width="0.2in"/>
      </text:list-level-style-number>
      <text:list-level-style-number text:level="2" text:style-name="Character_5f_20_5f_style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Character_5f_20_5f_style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Character_5f_20_5f_style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Character_5f_20_5f_style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Character_5f_20_5f_style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Character_5f_20_5f_style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Character_5f_20_5f_style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Character_5f_20_5f_style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Character_5f_20_5f_style" loext:num-list-format="%10%.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dio Etiquette Cheat Sheet</text:p>
      <text:p text:style-name="P2"/>
      <text:p text:style-name="P2"/>
      <text:p text:style-name="P3"><text:span text:style-name="T1">General </text:span>Radio Etiquette</text:p>
      <text:list xml:id="list719220814" text:style-name="L1">
        <text:list-item>
          <text:p text:style-name="P4">Listen and wait for a pause in radio traffic before talking. (transmitting)</text:p>
        </text:list-item>
        <text:list-item>
          <text:p text:style-name="P4"><text:span text:style-name="T2">Hold down the push-to-talk (PTT) button and </text:span><text:span text:style-name="T3">wait 1 second</text:span><text:span text:style-name="T2"> because </text:span><text:span text:style-name="T4">your radio’s</text:span><text:span text:style-name="T2"> transmitter may take that long to kick in.</text:span></text:p>
        </text:list-item>
      </text:list>
      <text:list xml:id="list3665347907" text:style-name="Numbering_20_abc">
        <text:list-item>
          <text:list>
            <text:list-item>
              <text:p text:style-name="P5">Hold down the PTT button firmly for as long as you are speaking.</text:p>
            </text:list-item>
            <text:list-item>
              <text:p text:style-name="P5">No one else can transmit while you are transmitting, so…</text:p>
            </text:list-item>
            <text:list-item>
              <text:p text:style-name="P5"><text:span text:style-name="T2">Say one thing only each time you transmit. </text:span><text:span text:style-name="T3">Don’t ramble</text:span><text:span text:style-name="T2">.</text:span></text:p>
            </text:list-item>
          </text:list>
        </text:list-item>
      </text:list>
      <text:list xml:id="list125834828238752" text:continue-list="list719220814" text:style-name="L1">
        <text:list-item>
          <text:p text:style-name="P4"><text:span text:style-name="T5">S</text:span><text:span text:style-name="T2">ay the name </text:span><text:span text:style-name="T5">of </text:span><text:span text:style-name="T6">who</text:span><text:span text:style-name="T5"> you’re calling </text:span><text:span text:style-name="T2">2-3 times, and then your own.</text:span></text:p>
        </text:list-item>
        <text:list-item>
          <text:p text:style-name="P4">When you are done, say "<text:span text:style-name="T7">O</text:span>ver" to indicate the other side can talk.</text:p>
        </text:list-item>
        <text:list-item>
          <text:p text:style-name="P4">To break into a conversation, say "<text:span text:style-name="T7">B</text:span>reak" and your name <text:span text:style-name="T8">during a pause</text:span>.</text:p>
        </text:list-item>
      </text:list>
      <text:list xml:id="list125835694854721" text:continue-list="list3665347907" text:style-name="Numbering_20_abc">
        <text:list-item>
          <text:list>
            <text:list-item text:start-value="1">
              <text:p text:style-name="P5">Say “<text:span text:style-name="T7">P</text:span>riority” if <text:span text:style-name="T8">it’s</text:span> urgent, “<text:span text:style-name="T7">E</text:span>mergency” if <text:span text:style-name="T8">it’s </text:span>an emergency.</text:p>
            </text:list-item>
          </text:list>
        </text:list-item>
      </text:list>
      <text:list text:continue-list="list125834828238752" text:style-name="L1">
        <text:list-item>
          <text:p text:style-name="P4">Acknowledge the other side's transmission with "Copy” or “Roger”.</text:p>
        </text:list-item>
        <text:list-item>
          <text:p text:style-name="P4"><text:span text:style-name="T2">When your conversation is over, say your </text:span><text:span text:style-name="T5">name</text:span><text:span text:style-name="T2"> and then "</text:span><text:span text:style-name="T9">Cl</text:span><text:span text:style-name="T2">ear" to indicate that you're leaving the channel open for others to use.</text:span></text:p>
        </text:list-item>
      </text:list>
      <text:p text:style-name="P6"/>
      <text:p text:style-name="P7"><text:span text:style-name="T10">Repeater</text:span> Etiquette</text:p>
      <text:p text:style-name="P6">A repeater is a shared resource for many radio operators. Keep conversations brief! <text:span text:style-name="T11">Move longer conversations off the repeater ASAP</text:span>.</text:p>
      <text:p text:style-name="P6"/>
      <text:list text:continue-numbering="true" text:style-name="L1">
        <text:list-item text:start-value="1">
          <text:p text:style-name="P4"><text:span text:style-name="T12">Follow all the </text:span><text:span text:style-name="T6">general radio etiquette rules</text:span><text:span text:style-name="T12">!</text:span></text:p>
        </text:list-item>
        <text:list-item>
          <text:p text:style-name="P4">Wait an extra second <text:span text:style-name="T1">before talking</text:span>; some repeaters have a courtesy tone you can hear that tells you when you can start talking.</text:p>
        </text:list-item>
        <text:list-item>
          <text:p text:style-name="P4">State your <text:span text:style-name="T7">FCC </text:span>callsign at the beginning of your first transmission.</text:p>
        </text:list-item>
        <text:list-item>
          <text:p text:style-name="P4">If necessary, exchange contact info with the person you’re talking to: a non-repeater GMRS channel, a phone number, even a meeting place.</text:p>
        </text:list-item>
        <text:list-item>
          <text:p text:style-name="P4">When you finish, release the PTT button and listen for the repeater to make the tone that says your transmission was successfully received.</text:p>
        </text:list-item>
        <text:list-item>
          <text:p text:style-name="P4">Wait an extra second before speaking again, <text:span text:style-name="T7">to give time for others to transmit to the repeater </text:span><text:span text:style-name="T1">if they need to break in.</text:span></text:p>
        </text:list-item>
      </text:list>
      <text:p text:style-name="P8"/>
      <text:p text:style-name="P3">NATO Phonetic Alphabe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8"><text:span text:style-name="T13">A</text:span>lfa</text:p>
          </table:table-cell>
          <table:table-cell table:style-name="Table2.A1" office:value-type="string">
            <text:p text:style-name="P8"><text:span text:style-name="T13">E</text:span>cho</text:p>
          </table:table-cell>
          <table:table-cell table:style-name="Table2.A1" office:value-type="string">
            <text:p text:style-name="P8"><text:span text:style-name="T13">I</text:span>ndia</text:p>
          </table:table-cell>
          <table:table-cell table:style-name="Table2.A1" office:value-type="string">
            <text:p text:style-name="P8"><text:span text:style-name="T13">M</text:span>ike</text:p>
          </table:table-cell>
          <table:table-cell table:style-name="Table2.A1" office:value-type="string">
            <text:p text:style-name="P8"><text:span text:style-name="T13">Q</text:span>uebec</text:p>
          </table:table-cell>
          <table:table-cell table:style-name="Table2.A1" office:value-type="string">
            <text:p text:style-name="P8"><text:span text:style-name="T13">U</text:span>niform</text:p>
          </table:table-cell>
          <table:table-cell table:style-name="Table2.A1" office:value-type="string">
            <text:p text:style-name="P8"><text:span text:style-name="T13">Y</text:span>ankee</text:p>
          </table:table-cell>
        </table:table-row>
        <table:table-row>
          <table:table-cell table:style-name="Table2.A1" office:value-type="string">
            <text:p text:style-name="P8"><text:span text:style-name="T13">B</text:span>ravo</text:p>
          </table:table-cell>
          <table:table-cell table:style-name="Table2.A1" office:value-type="string">
            <text:p text:style-name="P8"><text:span text:style-name="T13">F</text:span>oxtrot</text:p>
          </table:table-cell>
          <table:table-cell table:style-name="Table2.A1" office:value-type="string">
            <text:p text:style-name="P8"><text:span text:style-name="T13">J</text:span>uliett</text:p>
          </table:table-cell>
          <table:table-cell table:style-name="Table2.A1" office:value-type="string">
            <text:p text:style-name="P8"><text:span text:style-name="T13">N</text:span>ovember</text:p>
          </table:table-cell>
          <table:table-cell table:style-name="Table2.A1" office:value-type="string">
            <text:p text:style-name="P8"><text:span text:style-name="T13">R</text:span>omeo</text:p>
          </table:table-cell>
          <table:table-cell table:style-name="Table2.A1" office:value-type="string">
            <text:p text:style-name="P8"><text:span text:style-name="T13">V</text:span>ictor</text:p>
          </table:table-cell>
          <table:table-cell table:style-name="Table2.A1" office:value-type="string">
            <text:p text:style-name="P8"><text:span text:style-name="T13">Z</text:span>ulu</text:p>
          </table:table-cell>
        </table:table-row>
        <table:table-row>
          <table:table-cell table:style-name="Table2.A1" office:value-type="string">
            <text:p text:style-name="P8"><text:span text:style-name="T13">C</text:span>harlie</text:p>
          </table:table-cell>
          <table:table-cell table:style-name="Table2.A1" office:value-type="string">
            <text:p text:style-name="P8"><text:span text:style-name="T13">G</text:span>olf</text:p>
          </table:table-cell>
          <table:table-cell table:style-name="Table2.A1" office:value-type="string">
            <text:p text:style-name="P8"><text:span text:style-name="T14">K</text:span><text:span text:style-name="T15">ilo</text:span></text:p>
          </table:table-cell>
          <table:table-cell table:style-name="Table2.A1" office:value-type="string">
            <text:p text:style-name="P8"><text:span text:style-name="T13">O</text:span>scar</text:p>
          </table:table-cell>
          <table:table-cell table:style-name="Table2.A1" office:value-type="string">
            <text:p text:style-name="P8"><text:span text:style-name="T13">S</text:span>ierra</text:p>
          </table:table-cell>
          <table:table-cell table:style-name="Table2.A1" office:value-type="string">
            <text:p text:style-name="P8"><text:span text:style-name="T13">W</text:span>hiskey</text:p>
          </table:table-cell>
          <table:table-cell table:style-name="Table2.A1" office:value-type="string">
            <text:p text:style-name="P8"/>
          </table:table-cell>
        </table:table-row>
        <table:table-row table:style-name="Table2.4">
          <table:table-cell table:style-name="Table2.A1" office:value-type="string">
            <text:p text:style-name="P8"><text:span text:style-name="T13">D</text:span>elta</text:p>
          </table:table-cell>
          <table:table-cell table:style-name="Table2.A1" office:value-type="string">
            <text:p text:style-name="P8"><text:span text:style-name="T13">H</text:span>otel</text:p>
          </table:table-cell>
          <table:table-cell table:style-name="Table2.A1" office:value-type="string">
            <text:p text:style-name="P8"><text:span text:style-name="T13">L</text:span>ima</text:p>
          </table:table-cell>
          <table:table-cell table:style-name="Table2.A1" office:value-type="string">
            <text:p text:style-name="P8"><text:span text:style-name="T13">P</text:span>apa</text:p>
          </table:table-cell>
          <table:table-cell table:style-name="Table2.A1" office:value-type="string">
            <text:p text:style-name="P8"><text:span text:style-name="T13">T</text:span>ango</text:p>
          </table:table-cell>
          <table:table-cell table:style-name="Table2.A1" office:value-type="string">
            <text:p text:style-name="P8"><text:span text:style-name="T13">X</text:span>-Ray</text:p>
          </table:table-cell>
          <table:table-cell table:style-name="Table2.A1" office:value-type="string">
            <text:p text:style-name="P8"/>
          </table:table-cell>
        </table:table-row>
      </table:table>
      <text:p text:style-name="P1"><text:soft-page-break/>Radio Etiquette Cheat Sheet</text:p>
      <text:p text:style-name="P2"/>
      <text:p text:style-name="P2"/>
      <text:p text:style-name="P3"><text:span text:style-name="T1">General </text:span>Radio Etiquette</text:p>
      <text:list xml:id="list125833829333532" text:continue-numbering="true" text:style-name="L1">
        <text:list-item text:start-value="1">
          <text:p text:style-name="P4">Listen and wait for a pause in radio traffic before talking. (transmitting)</text:p>
        </text:list-item>
        <text:list-item>
          <text:p text:style-name="P4"><text:span text:style-name="T2">Hold down the push-to-talk (PTT) button and </text:span><text:span text:style-name="T3">wait 1 second</text:span><text:span text:style-name="T2"> because </text:span><text:span text:style-name="T4">your radio’s</text:span><text:span text:style-name="T2"> transmitter may take that long to kick in.</text:span></text:p>
        </text:list-item>
      </text:list>
      <text:list xml:id="list125835191054184" text:continue-list="list125835694854721" text:style-name="Numbering_20_abc">
        <text:list-item>
          <text:list>
            <text:list-item text:start-value="1">
              <text:p text:style-name="P5">Hold down the PTT button firmly for as long as you are speaking.</text:p>
            </text:list-item>
            <text:list-item>
              <text:p text:style-name="P5">No one else can transmit while you are transmitting, so…</text:p>
            </text:list-item>
            <text:list-item>
              <text:p text:style-name="P5"><text:span text:style-name="T2">Say one thing only each time you transmit. </text:span><text:span text:style-name="T3">Don’t ramble</text:span><text:span text:style-name="T2">.</text:span></text:p>
            </text:list-item>
          </text:list>
        </text:list-item>
      </text:list>
      <text:list xml:id="list125834273866344" text:continue-list="list125833829333532" text:style-name="L1">
        <text:list-item>
          <text:p text:style-name="P4"><text:span text:style-name="T5">S</text:span><text:span text:style-name="T2">ay the name </text:span><text:span text:style-name="T5">of </text:span><text:span text:style-name="T6">who</text:span><text:span text:style-name="T5"> you’re calling </text:span><text:span text:style-name="T2">2-3 times, and then your own.</text:span></text:p>
        </text:list-item>
        <text:list-item>
          <text:p text:style-name="P4">When you are done, say "<text:span text:style-name="T7">O</text:span>ver" to indicate the other side can talk.</text:p>
        </text:list-item>
        <text:list-item>
          <text:p text:style-name="P4">To break into a conversation, say "<text:span text:style-name="T7">B</text:span>reak" and your name <text:span text:style-name="T8">during a pause</text:span>.</text:p>
        </text:list-item>
      </text:list>
      <text:list text:continue-list="list125835191054184" text:style-name="Numbering_20_abc">
        <text:list-item>
          <text:list>
            <text:list-item text:start-value="1">
              <text:p text:style-name="P5">Say “<text:span text:style-name="T7">P</text:span>riority” if <text:span text:style-name="T8">it’s</text:span> urgent, “<text:span text:style-name="T7">E</text:span>mergency” if <text:span text:style-name="T8">it’s </text:span>an emergency.</text:p>
            </text:list-item>
          </text:list>
        </text:list-item>
      </text:list>
      <text:list text:continue-list="list125834273866344" text:style-name="L1">
        <text:list-item>
          <text:p text:style-name="P4">Acknowledge the other side's transmission with "Copy” or “Roger”.</text:p>
        </text:list-item>
        <text:list-item>
          <text:p text:style-name="P4"><text:span text:style-name="T2">When your conversation is over, say your </text:span><text:span text:style-name="T5">name</text:span><text:span text:style-name="T2"> and then "</text:span><text:span text:style-name="T9">Cl</text:span><text:span text:style-name="T2">ear" to indicate that you're leaving the channel open for others to use.</text:span></text:p>
        </text:list-item>
      </text:list>
      <text:p text:style-name="P6"/>
      <text:p text:style-name="P7"><text:span text:style-name="T10">Repeater</text:span> Etiquette</text:p>
      <text:p text:style-name="P6">A repeater is a shared resource for many radio operators. Keep conversations brief! <text:span text:style-name="T11">Move longer conversations off the repeater ASAP</text:span>.</text:p>
      <text:p text:style-name="P6"/>
      <text:list text:continue-numbering="true" text:style-name="L1">
        <text:list-item text:start-value="1">
          <text:p text:style-name="P4"><text:span text:style-name="T12">Follow all the </text:span><text:span text:style-name="T6">general radio etiquette rules</text:span><text:span text:style-name="T12">!</text:span></text:p>
        </text:list-item>
        <text:list-item>
          <text:p text:style-name="P4">Wait an extra second <text:span text:style-name="T1">before talking</text:span>; some repeaters have a courtesy tone you can hear that tells you when you can start talking.</text:p>
        </text:list-item>
        <text:list-item>
          <text:p text:style-name="P4">State your <text:span text:style-name="T7">FCC </text:span>callsign at the beginning of your first transmission.</text:p>
        </text:list-item>
        <text:list-item>
          <text:p text:style-name="P4">If necessary, exchange contact info with the person you’re talking to: a non-repeater GMRS channel, a phone number, even a meeting place.</text:p>
        </text:list-item>
        <text:list-item>
          <text:p text:style-name="P4">When you finish, release the PTT button and listen for the repeater to make the tone that says your transmission was successfully received.</text:p>
        </text:list-item>
        <text:list-item>
          <text:p text:style-name="P4">Wait an extra second before speaking again, <text:span text:style-name="T7">to give time for others to transmit to the repeater </text:span><text:span text:style-name="T1">if they need to break in.</text:span></text:p>
        </text:list-item>
      </text:list>
      <text:p text:style-name="P8"/>
      <text:p text:style-name="P3">NATO Phonetic Alphabe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"><text:span text:style-name="T13">A</text:span>lfa</text:p>
          </table:table-cell>
          <table:table-cell table:style-name="Table1.A1" office:value-type="string">
            <text:p text:style-name="P8"><text:span text:style-name="T13">E</text:span>cho</text:p>
          </table:table-cell>
          <table:table-cell table:style-name="Table1.A1" office:value-type="string">
            <text:p text:style-name="P8"><text:span text:style-name="T13">I</text:span>ndia</text:p>
          </table:table-cell>
          <table:table-cell table:style-name="Table1.A1" office:value-type="string">
            <text:p text:style-name="P8"><text:span text:style-name="T13">M</text:span>ike</text:p>
          </table:table-cell>
          <table:table-cell table:style-name="Table1.A1" office:value-type="string">
            <text:p text:style-name="P8"><text:span text:style-name="T13">Q</text:span>uebec</text:p>
          </table:table-cell>
          <table:table-cell table:style-name="Table1.A1" office:value-type="string">
            <text:p text:style-name="P8"><text:span text:style-name="T13">U</text:span>niform</text:p>
          </table:table-cell>
          <table:table-cell table:style-name="Table1.A1" office:value-type="string">
            <text:p text:style-name="P8"><text:span text:style-name="T13">Y</text:span>ankee</text:p>
          </table:table-cell>
        </table:table-row>
        <table:table-row>
          <table:table-cell table:style-name="Table1.A1" office:value-type="string">
            <text:p text:style-name="P8"><text:span text:style-name="T13">B</text:span>ravo</text:p>
          </table:table-cell>
          <table:table-cell table:style-name="Table1.A1" office:value-type="string">
            <text:p text:style-name="P8"><text:span text:style-name="T13">F</text:span>oxtrot</text:p>
          </table:table-cell>
          <table:table-cell table:style-name="Table1.A1" office:value-type="string">
            <text:p text:style-name="P8"><text:span text:style-name="T13">J</text:span>uliett</text:p>
          </table:table-cell>
          <table:table-cell table:style-name="Table1.A1" office:value-type="string">
            <text:p text:style-name="P8"><text:span text:style-name="T13">N</text:span>ovember</text:p>
          </table:table-cell>
          <table:table-cell table:style-name="Table1.A1" office:value-type="string">
            <text:p text:style-name="P8"><text:span text:style-name="T13">R</text:span>omeo</text:p>
          </table:table-cell>
          <table:table-cell table:style-name="Table1.A1" office:value-type="string">
            <text:p text:style-name="P8"><text:span text:style-name="T13">V</text:span>ictor</text:p>
          </table:table-cell>
          <table:table-cell table:style-name="Table1.A1" office:value-type="string">
            <text:p text:style-name="P8"><text:span text:style-name="T13">Z</text:span>ulu</text:p>
          </table:table-cell>
        </table:table-row>
        <table:table-row>
          <table:table-cell table:style-name="Table1.A1" office:value-type="string">
            <text:p text:style-name="P8"><text:span text:style-name="T13">C</text:span>harlie</text:p>
          </table:table-cell>
          <table:table-cell table:style-name="Table1.A1" office:value-type="string">
            <text:p text:style-name="P8"><text:span text:style-name="T13">G</text:span>olf</text:p>
          </table:table-cell>
          <table:table-cell table:style-name="Table1.A1" office:value-type="string">
            <text:p text:style-name="P8"><text:span text:style-name="T14">K</text:span><text:span text:style-name="T15">ilo</text:span></text:p>
          </table:table-cell>
          <table:table-cell table:style-name="Table1.A1" office:value-type="string">
            <text:p text:style-name="P8"><text:span text:style-name="T13">O</text:span>scar</text:p>
          </table:table-cell>
          <table:table-cell table:style-name="Table1.A1" office:value-type="string">
            <text:p text:style-name="P8"><text:span text:style-name="T13">S</text:span>ierra</text:p>
          </table:table-cell>
          <table:table-cell table:style-name="Table1.A1" office:value-type="string">
            <text:p text:style-name="P8"><text:span text:style-name="T13">W</text:span>hiskey</text:p>
          </table:table-cell>
          <table:table-cell table:style-name="Table1.A1" office:value-type="string">
            <text:p text:style-name="P8"/>
          </table:table-cell>
        </table:table-row>
        <table:table-row table:style-name="Table1.4">
          <table:table-cell table:style-name="Table1.A1" office:value-type="string">
            <text:p text:style-name="P8"><text:span text:style-name="T13">D</text:span>elta</text:p>
          </table:table-cell>
          <table:table-cell table:style-name="Table1.A1" office:value-type="string">
            <text:p text:style-name="P8"><text:span text:style-name="T13">H</text:span>otel</text:p>
          </table:table-cell>
          <table:table-cell table:style-name="Table1.A1" office:value-type="string">
            <text:p text:style-name="P8"><text:span text:style-name="T13">L</text:span>ima</text:p>
          </table:table-cell>
          <table:table-cell table:style-name="Table1.A1" office:value-type="string">
            <text:p text:style-name="P8"><text:span text:style-name="T13">P</text:span>apa</text:p>
          </table:table-cell>
          <table:table-cell table:style-name="Table1.A1" office:value-type="string">
            <text:p text:style-name="P8"><text:span text:style-name="T13">T</text:span>ango</text:p>
          </table:table-cell>
          <table:table-cell table:style-name="Table1.A1" office:value-type="string">
            <text:p text:style-name="P8"><text:span text:style-name="T13">X</text:span>-Ray</text:p>
          </table:table-cell>
          <table:table-cell table:style-name="Table1.A1" office:value-type="string">
            <text:p text:style-name="P8"/>
          </table:table-cell>
        </table:table-row>
      </table:table>
      <text:p text:style-name="P8"/>
      <text:p text:style-name="P9"><text:soft-page-break/>Radio Terminology</text:p>
      <text:p text:style-name="P10"/>
      <text:p text:style-name="P10"/>
      <text:p text:style-name="P11"><text:bookmark text:name="docs-internal-guid-73f39e85-7fff-06af-2f8f-75aabfc77555"/><text:span text:style-name="T16">Acknowledged:</text:span><text:span text:style-name="T17"> </text:span><text:span text:style-name="T2">I heard and understand you. Same as “Copy”.</text:span></text:p>
      <text:p text:style-name="P12"><text:span text:style-name="T16">Affirmative:</text:span><text:span text:style-name="T17"> </text:span><text:span text:style-name="T2">Same as “Yes”. Avoid “yes” or “yeah”, as they are difficult to hear on the air.</text:span></text:p>
      <text:p text:style-name="P12"><text:span text:style-name="T16">Break:</text:span><text:span text:style-name="T17"> </text:span><text:span text:style-name="T2">You are interrupting a communication. See “Priority” and “Emergency”.</text:span></text:p>
      <text:p text:style-name="P12"><text:span text:style-name="T16">Clear:</text:span><text:span text:style-name="T17"> </text:span><text:span text:style-name="T2">Say at the end of a conversation to tell anyone listening t</text:span><text:span text:style-name="T18">hat t</text:span><text:span text:style-name="T2">he channel is now clear for others to use.</text:span></text:p>
      <text:p text:style-name="P12"><text:span text:style-name="T16">Come in:</text:span><text:span text:style-name="T17"> </text:span><text:span text:style-name="T2">You are asking the other party to acknowledge they hear you.</text:span></text:p>
      <text:p text:style-name="P12"><text:span text:style-name="T16">Confirm:</text:span><text:span text:style-name="T17"> </text:span><text:span text:style-name="T2">Use to explicitly verify information you heard. “Please confirm…”</text:span></text:p>
      <text:p text:style-name="P12"><text:span text:style-name="T16">Copy:</text:span><text:span text:style-name="T17"> </text:span><text:span text:style-name="T2">Same as “Acknowledged”.</text:span></text:p>
      <text:p text:style-name="P12"><text:span text:style-name="T16">Correction:</text:span><text:span text:style-name="T17"> </text:span><text:span text:style-name="T2">Fix what you just said incorrectly. “Correction, the address is…”</text:span></text:p>
      <text:p text:style-name="P12"><text:span text:style-name="T16">Did not copy:</text:span><text:span text:style-name="T17"> </text:span><text:span text:style-name="T2">You could not hear or understand the last transmission.</text:span></text:p>
      <text:p text:style-name="P12"><text:span text:style-name="T16">Disregard:</text:span><text:span text:style-name="T17"> “</text:span><text:span text:style-name="T2">Disregard my last transmission.”</text:span></text:p>
      <text:p text:style-name="P12"><text:span text:style-name="T16">Emergency:</text:span><text:span text:style-name="T17"> </text:span><text:span text:style-name="T2">Used to signal a life-threatening transmission. “(Your callsign), break, break, break, emergency.”</text:span></text:p>
      <text:p text:style-name="P12"><text:span text:style-name="T16">Go ahead:</text:span><text:span text:style-name="T17"> </text:span><text:span text:style-name="T2">You are ready to receive transmission.</text:span></text:p>
      <text:p text:style-name="P12"><text:span text:style-name="T16">Negative:</text:span><text:span text:style-name="T17"> </text:span><text:span text:style-name="T2">Means “No”, but easier to distinguish on the air.</text:span></text:p>
      <text:p text:style-name="P12"><text:span text:style-name="T16">Out:</text:span><text:span text:style-name="T17"> </text:span><text:span text:style-name="T2">All conversation is finished. Same as “Clear”.</text:span></text:p>
      <text:p text:style-name="P12"><text:span text:style-name="T16">Over:</text:span><text:span text:style-name="T17"> </text:span><text:span text:style-name="T2">Your message is finished </text:span><text:span text:style-name="T19">and</text:span><text:span text:style-name="T2"> you expect a response, vs “Clear/Out”.</text:span></text:p>
      <text:p text:style-name="P12"><text:span text:style-name="T16">Priority:</text:span><text:span text:style-name="T17"> </text:span><text:span text:style-name="T2">Used to signal an important — but not life-threatening — transmission. “(Your callsign), break, break, break, priority.”</text:span></text:p>
      <text:p text:style-name="P12"><text:span text:style-name="T16">Repeat:</text:span><text:span text:style-name="T17"> </text:span><text:span text:style-name="T2">Used </text:span><text:span text:style-name="T3">before</text:span><text:span text:style-name="T17"> </text:span><text:span text:style-name="T2">you repeat something: “I need 9, repeat 9, gallons of diesel fuel.”</text:span></text:p>
      <text:p text:style-name="P12"><text:span text:style-name="T16">Roger:</text:span><text:span text:style-name="T17"> </text:span><text:span text:style-name="T2">Same as “Acknowledged”.</text:span></text:p>
      <text:p text:style-name="P12"><text:span text:style-name="T16">Say again:</text:span><text:span text:style-name="T17"> </text:span><text:span text:style-name="T2">Asking the other station to repeat what they just said.</text:span></text:p>
      <text:p text:style-name="P12"><text:span text:style-name="T16">Stand by:</text:span><text:span text:style-name="T17"> </text:span><text:span text:style-name="T2">You acknowledge the other party, but are unable to respond immediately.</text:span></text:p>
      <text:p text:style-name="P12"><text:span text:style-name="T16">Traffic:</text:span><text:span text:style-name="T17"> </text:span><text:span text:style-name="T2">A message or info to pass on the air. “I have two pieces of traffic for the medics.”</text:span></text:p>
      <text:p text:style-name="P13">Radio Terminology</text:p>
      <text:p text:style-name="P10"/>
      <text:p text:style-name="P10"/>
      <text:p text:style-name="P11"><text:bookmark text:name="docs-internal-guid-73f39e85-7fff-06af-2f8f-75aabfc77555 Copy 1"/><text:span text:style-name="T16">Acknowledged:</text:span><text:span text:style-name="T17"> </text:span><text:span text:style-name="T2">I heard and understand you. Same as “Copy”.</text:span></text:p>
      <text:p text:style-name="P12"><text:span text:style-name="T16">Affirmative:</text:span><text:span text:style-name="T17"> </text:span><text:span text:style-name="T2">Same as “Yes”. Avoid “yes” or “yeah”, as they are difficult to hear on the air.</text:span></text:p>
      <text:p text:style-name="P12"><text:span text:style-name="T16">Break:</text:span><text:span text:style-name="T17"> </text:span><text:span text:style-name="T2">You are interrupting a communication. See “Priority” and “Emergency”.</text:span></text:p>
      <text:p text:style-name="P14"><text:span text:style-name="T16">Clear:</text:span><text:span text:style-name="T2"> Say at the end of a conversation to tell anyone listening t</text:span><text:span text:style-name="T18">hat t</text:span><text:span text:style-name="T2">he channel is now clear for others to use.</text:span></text:p>
      <text:p text:style-name="P12"><text:span text:style-name="T16">Come in:</text:span><text:span text:style-name="T17"> </text:span><text:span text:style-name="T2">You are asking the other party to acknowledge they hear you.</text:span></text:p>
      <text:p text:style-name="P12"><text:span text:style-name="T16">Confirm:</text:span><text:span text:style-name="T17"> </text:span><text:span text:style-name="T2">Use to explicitly verify information you heard. “Please confirm…”</text:span></text:p>
      <text:p text:style-name="P12"><text:span text:style-name="T16">Copy:</text:span><text:span text:style-name="T17"> </text:span><text:span text:style-name="T2">Same as “Acknowledged”.</text:span></text:p>
      <text:p text:style-name="P12"><text:span text:style-name="T16">Correction:</text:span><text:span text:style-name="T17"> </text:span><text:span text:style-name="T2">Fix what you just said incorrectly. “Correction, the address is…”</text:span></text:p>
      <text:p text:style-name="P12"><text:span text:style-name="T16">Did not copy:</text:span><text:span text:style-name="T17"> </text:span><text:span text:style-name="T2">You could not hear or understand the last transmission.</text:span></text:p>
      <text:p text:style-name="P12"><text:span text:style-name="T16">Disregard:</text:span><text:span text:style-name="T17"> “</text:span><text:span text:style-name="T2">Disregard my last transmission.”</text:span></text:p>
      <text:p text:style-name="P12"><text:span text:style-name="T16">Emergency:</text:span><text:span text:style-name="T17"> </text:span><text:span text:style-name="T2">Used to signal a life-threatening transmission. “(Your callsign), break, break, break, emergency.”</text:span></text:p>
      <text:p text:style-name="P12"><text:span text:style-name="T16">Go ahead:</text:span><text:span text:style-name="T17"> </text:span><text:span text:style-name="T2">You are ready to receive transmission.</text:span></text:p>
      <text:p text:style-name="P12"><text:span text:style-name="T16">Negative:</text:span><text:span text:style-name="T17"> </text:span><text:span text:style-name="T2">Means “No”, but easier to distinguish on the air.</text:span></text:p>
      <text:p text:style-name="P12"><text:span text:style-name="T16">Out:</text:span><text:span text:style-name="T17"> </text:span><text:span text:style-name="T2">All conversation is finished. Same as “Clear”.</text:span></text:p>
      <text:p text:style-name="P12"><text:span text:style-name="T16">Over:</text:span><text:span text:style-name="T17"> </text:span><text:span text:style-name="T2">Your message is finished </text:span><text:span text:style-name="T19">and</text:span><text:span text:style-name="T2"> you expect a response, vs “Clear/Out”.</text:span></text:p>
      <text:p text:style-name="P12"><text:span text:style-name="T16">Priority:</text:span><text:span text:style-name="T17"> </text:span><text:span text:style-name="T2">Used to signal an important — but not life-threatening — transmission. “(Your callsign), break, break, break, priority.”</text:span></text:p>
      <text:p text:style-name="P12"><text:span text:style-name="T16">Repeat:</text:span><text:span text:style-name="T17"> </text:span><text:span text:style-name="T2">Used </text:span><text:span text:style-name="T3">before</text:span><text:span text:style-name="T17"> </text:span><text:span text:style-name="T2">you repeat something: “I need 9, repeat 9, gallons of diesel fuel.”</text:span></text:p>
      <text:p text:style-name="P12"><text:span text:style-name="T16">Roger:</text:span><text:span text:style-name="T17"> </text:span><text:span text:style-name="T2">Same as “Acknowledged”.</text:span></text:p>
      <text:p text:style-name="P12"><text:span text:style-name="T16">Say again:</text:span><text:span text:style-name="T17"> </text:span><text:span text:style-name="T2">Asking the other station to repeat what they just said.</text:span></text:p>
      <text:p text:style-name="P12"><text:span text:style-name="T16">Stand by:</text:span><text:span text:style-name="T17"> </text:span><text:span text:style-name="T2">You acknowledge the other party, but are unable to respond immediately.</text:span></text:p>
      <text:p text:style-name="P12"><text:span text:style-name="T16">Traffic:</text:span><text:span text:style-name="T17"> </text:span><text:span text:style-name="T2">A message or info to pass on the air. “I have two pieces of traffic for the medics.”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Helvetica" fo:font-family="Helvetica" style:font-family-generic="swiss" style:font-pitch="variable" fo:font-size="14pt" style:font-size-asian="12.25pt" style:font-size-complex="14pt"/>
    </style:style>
    <style:style style:name="Character_5f_20_5f_style" style:display-name="Character_20_style" style:family="text">
      <style:text-properties style:font-name="Helvetica" fo:font-family="Helvetica" style:font-family-generic="swiss" style:font-pitch="variable" fo:font-size="14pt" style:font-size-asian="12.25pt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4T13:32:54.524060737</meta:creation-date>
    <meta:print-date>2026-04-28T09:34:50.584419000</meta:print-date>
    <dc:date>2026-05-26T12:58:33.234492000</dc:date>
    <meta:editing-duration>P1DT14H42M16S</meta:editing-duration>
    <meta:editing-cycles>25</meta:editing-cycles>
    <meta:generator>LibreOffice/26.2.2.2$MacOSX_X86_64 LibreOffice_project/1f77d10d6938fd34972958f64b2bcfa54f8b1ba5</meta:generator>
    <meta:document-statistic meta:table-count="2" meta:image-count="0" meta:object-count="0" meta:page-count="4" meta:paragraph-count="140" meta:word-count="1152" meta:character-count="6818" meta:non-whitespace-character-count="5836"/>
  </office:meta>
</office:document-meta>
</file>