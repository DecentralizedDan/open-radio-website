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Helvetica" fo:font-size="24pt" officeooo:rsid="0017a092" officeooo:paragraph-rsid="0017a092" style:font-size-asian="21pt" style:font-size-complex="2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Helvetica" fo:font-size="12pt" officeooo:rsid="0017a092" officeooo:paragraph-rsid="0017a092" style:font-size-asian="10.5pt" style:font-size-complex="12pt"/>
    </style:style>
    <style:style style:name="P3" style:family="paragraph" style:parent-style-name="Standard">
      <style:paragraph-properties fo:line-height="115%" fo:text-align="left" style:justify-single-word="false"/>
      <style:text-properties style:font-name="Helvetica" fo:font-size="12pt" officeooo:rsid="0017a092" officeooo:paragraph-rsid="0017a092" style:font-size-asian="10.5pt" style:font-size-complex="12pt"/>
    </style:style>
    <style:style style:name="P4" style:family="paragraph" style:parent-style-name="Standard">
      <style:paragraph-properties fo:line-height="115%" fo:text-align="left" style:justify-single-word="false"/>
      <style:text-properties style:font-name="Helvetica" fo:font-size="12pt" style:text-underline-style="solid" style:text-underline-width="auto" style:text-underline-color="font-color" fo:font-weight="bold" officeooo:rsid="0018148a" officeooo:paragraph-rsid="0018148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left" style:justify-single-word="false"/>
      <style:text-properties style:font-name="Helvetica" fo:font-size="12pt" fo:font-weight="normal" officeooo:rsid="0018148a" officeooo:paragraph-rsid="0018148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left" style:justify-single-word="false"/>
      <style:text-properties style:font-name="Helvetica" fo:font-size="12pt" fo:font-style="normal" fo:font-weight="normal" officeooo:rsid="0018148a" officeooo:paragraph-rsid="0018148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15%" fo:text-align="left" style:justify-single-word="false"/>
      <style:text-properties style:font-name="Helvetica" fo:font-size="12pt" officeooo:rsid="0018148a" officeooo:paragraph-rsid="0018148a" style:font-size-asian="10.5pt" style:font-size-complex="12pt"/>
    </style:style>
    <style:style style:name="P8" style:family="paragraph" style:parent-style-name="Standard">
      <style:paragraph-properties fo:line-height="115%" fo:text-align="left" style:justify-single-word="false"/>
      <style:text-properties style:font-name="Helvetica" fo:font-size="12pt" style:text-underline-style="solid" style:text-underline-width="auto" style:text-underline-color="font-color" fo:font-weight="bold" officeooo:rsid="0017f0bb" officeooo:paragraph-rsid="0017f0b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left" style:justify-single-word="false"/>
      <style:text-properties style:font-name="Helvetica" fo:font-size="12pt" officeooo:rsid="0017f0bb" officeooo:paragraph-rsid="0017f0bb" style:font-size-asian="10.5pt" style:font-size-complex="12pt"/>
    </style:style>
    <style:style style:name="P10" style:family="paragraph" style:parent-style-name="Standard" style:list-style-name="L1">
      <style:paragraph-properties fo:line-height="115%" fo:text-align="left" style:justify-single-word="false"/>
      <style:text-properties style:font-name="Helvetica" fo:font-size="12pt" officeooo:rsid="0017f0bb" officeooo:paragraph-rsid="0017f0bb" style:font-size-asian="10.5pt" style:font-size-complex="12pt"/>
    </style:style>
    <style:style style:name="P11" style:family="paragraph" style:parent-style-name="Standard" style:list-style-name="L1">
      <style:paragraph-properties fo:line-height="115%" fo:text-align="left" style:justify-single-word="false"/>
      <style:text-properties style:font-name="Helvetica" fo:font-size="12pt" officeooo:rsid="0018148a" officeooo:paragraph-rsid="0018148a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ergency Radio 101 – Trainer Guide</text:p>
      <text:p text:style-name="P2"/>
      <text:p text:style-name="P3"/>
      <text:p text:style-name="P4">Introduction</text:p>
      <text:p text:style-name="P5">This is a fun workshop that’s good for almost any audience. It’s always topical because practically every place is subject to some kind of disaster, and it’s no great exaggeration to say that a disaster has always just happened <text:span text:style-name="T1">somewhere</text:span><text:span text:style-name="T2">, even if not the US.</text:span></text:p>
      <text:p text:style-name="P6"/>
      <text:p text:style-name="P6">Because learners for this one do not need a license or any radio knowledge or experience, it’s a great way to find folks for future workshops and activities. For all the above reasons this will probably be one of the workshops you give most often.</text:p>
      <text:p text:style-name="P7"><text:s/></text:p>
      <text:p text:style-name="P7"><text:span text:style-name="T3">Overview</text:span></text:p>
      <text:p text:style-name="P3"><text:span text:style-name="T4">Who</text:span>: People who do not need any radio knowledge or experience whatsoever.</text:p>
      <text:p text:style-name="P3"><text:span text:style-name="T4">What</text:span>: An engaging overview of how radio can help learners, their families, and their community during a disaster.</text:p>
      <text:p text:style-name="P3"><text:span text:style-name="T4">When</text:span>: This is a great first workshop for learners to attend. It introduces GMRS and Ham radio, both of which have their own 101-level workshops that can be done next if learners are interested. It also mentions PACE planning, a fun activity that can come next. Finally, you could offer the Radio Practical Skills activity next, too.</text:p>
      <text:p text:style-name="P3"><text:span text:style-name="T4">Why</text:span>: To provide immediately actionable information for folks and get them started on their radio journey.</text:p>
      <text:p text:style-name="P3"><text:span text:style-name="T4">How</text:span>: In a 90-minute slideshow, including Q&amp;A, along with a single handout.</text:p>
      <text:p text:style-name="P3"/>
      <text:p text:style-name="P3"/>
      <text:p text:style-name="P8">Logistics</text:p>
      <text:p text:style-name="P9">Like for most other workshops, Emergency Radio 101 requires:</text:p>
      <text:list text:style-name="L1">
        <text:list-item>
          <text:p text:style-name="P10">A room big enough for all the participants</text:p>
        </text:list-item>
        <text:list-item>
          <text:p text:style-name="P11">A projector and a screen</text:p>
        </text:list-item>
        <text:list-item>
          <text:p text:style-name="P11">A handout for every participant</text:p>
          <text:list>
            <text:list-item>
              <text:p text:style-name="P11">Handout is 4 pages, or 2 pages double-sided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16:40:41.566369000</meta:creation-date>
    <meta:generator>LibreOffice/26.2.2.2$MacOSX_X86_64 LibreOffice_project/1f77d10d6938fd34972958f64b2bcfa54f8b1ba5</meta:generator>
    <dc:date>2026-05-27T17:09:57.522731000</dc:date>
    <meta:editing-duration>PT18M45S</meta:editing-duration>
    <meta:editing-cycles>2</meta:editing-cycles>
    <meta:document-statistic meta:table-count="0" meta:image-count="0" meta:object-count="0" meta:page-count="1" meta:paragraph-count="17" meta:word-count="252" meta:character-count="1471" meta:non-whitespace-character-count="1237"/>
  </office:meta>
</office:document-meta>
</file>