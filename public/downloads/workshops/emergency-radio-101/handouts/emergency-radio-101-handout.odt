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6.5in" style:rel-column-width="65535*"/>
    </style:style>
    <style:style style:name="Table1.A1" style:family="table-cell">
      <style:table-cell-properties fo:padding="0.0403in" fo:border="0.05pt solid #000000" style:writing-mode="page"/>
    </style:style>
    <style:style style:name="Table3" style:family="table">
      <style:table-properties style:width="6.5in" style:rel-width="100%" table:align="left"/>
    </style:style>
    <style:style style:name="Table3.A" style:family="table-column">
      <style:table-column-properties style:column-width="6.5in" style:rel-column-width="6840*"/>
    </style:style>
    <style:style style:name="Table3.A1" style:family="table-cell">
      <style:table-cell-properties style:vertical-align="middle" fo:padding="0.0694in" fo:border="1pt solid #000000"/>
    </style:style>
    <style:style style:name="Table4" style:family="table">
      <style:table-properties style:width="6.5in" style:rel-width="100%" table:align="left"/>
    </style:style>
    <style:style style:name="Table4.A" style:family="table-column">
      <style:table-column-properties style:column-width="6.5in" style:rel-column-width="6840*"/>
    </style:style>
    <style:style style:name="Table4.A1" style:family="table-cell">
      <style:table-cell-properties style:vertical-align="middle" fo:padding="0.0694in" fo:border="1pt solid #000000"/>
    </style:style>
    <style:style style:name="Table5" style:family="table">
      <style:table-properties style:width="6.5in" style:rel-width="100%" table:align="left"/>
    </style:style>
    <style:style style:name="Table5.A" style:family="table-column">
      <style:table-column-properties style:column-width="3.0819in" style:rel-column-width="3243*"/>
    </style:style>
    <style:style style:name="Table5.B" style:family="table-column">
      <style:table-column-properties style:column-width="3.4181in" style:rel-column-width="3597*"/>
    </style:style>
    <style:style style:name="Table5.A1" style:family="table-cell">
      <style:table-cell-properties style:vertical-align="middle" fo:padding="0.0694in" fo:border="1pt solid #ffffff"/>
    </style:style>
    <style:style style:name="P1" style:family="paragraph" style:parent-style-name="Heading_20_1">
      <style:paragraph-properties fo:margin-left="0in" fo:margin-right="0in" fo:margin-top="0in" fo:margin-bottom="0in" style:contextual-spacing="false" fo:line-height="100%" fo:text-align="center" style:justify-single-word="false" fo:text-indent="0in" style:auto-text-indent="false" style:writing-mode="lr-tb"/>
      <style:text-properties style:font-name="Helvetica" fo:font-size="20pt" officeooo:paragraph-rsid="0012376c" style:font-size-asian="20pt" style:font-size-complex="20pt"/>
    </style:style>
    <style:style style:name="P2" style:family="paragraph" style:parent-style-name="Text_20_body">
      <style:paragraph-properties fo:margin-left="0in" fo:margin-right="0in" fo:margin-top="0in" fo:margin-bottom="0in" style:contextual-spacing="false" fo:line-height="100%" fo:text-indent="0in" style:auto-text-indent="false"/>
      <style:text-properties style:font-name="Helvetica" fo:font-size="12pt" officeooo:paragraph-rsid="0012376c" style:font-size-asian="12pt" style:font-size-complex="12pt"/>
    </style:style>
    <style:style style:name="P3"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font-name="Helvetica" fo:font-size="11pt" fo:font-style="normal" style:text-underline-style="solid" style:text-underline-width="auto" style:text-underline-color="font-color" fo:font-weight="bold" officeooo:paragraph-rsid="0012376c" fo:background-color="transparent" style:font-size-asian="11pt" style:font-size-complex="11pt"/>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5" style:family="paragraph" style:parent-style-name="Text_20_body">
      <style:paragraph-properties fo:margin-left="0in" fo:margin-right="0in" fo:margin-top="0in" fo:margin-bottom="0in" style:contextual-spacing="false" fo:line-height="100%" fo:text-indent="0in" style:auto-text-indent="false"/>
      <style:text-properties style:font-name="Helvetica" fo:font-size="11pt" officeooo:paragraph-rsid="0012376c" style:font-size-asian="11pt" style:font-size-complex="11pt"/>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Helvetica" fo:font-size="11pt" officeooo:paragraph-rsid="0012376c" style:font-size-asian="11pt" style:font-size-complex="11pt"/>
    </style:style>
    <style:style style:name="P7" style:family="paragraph" style:parent-style-name="Text_20_body" style:list-style-name="L1">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style:font-size-asian="11pt" style:font-size-complex="11pt"/>
    </style:style>
    <style:style style:name="P8" style:family="paragraph" style:parent-style-name="Text_20_body" style:list-style-name="L1">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9" style:family="paragraph" style:parent-style-name="Text_20_body" style:list-style-name="L1">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0" style:family="paragraph" style:parent-style-name="Text_20_body" style:list-style-name="L2">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style:font-size-asian="11pt" style:font-size-complex="11pt"/>
    </style:style>
    <style:style style:name="P11" style:family="paragraph" style:parent-style-name="Text_20_body" style:list-style-name="L2">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size="11pt" officeooo:paragraph-rsid="0012376c" style:font-size-asian="11pt" style:font-size-complex="11pt"/>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font-name="Helvetica" fo:font-size="11pt" fo:font-style="normal" style:text-underline-style="solid" style:text-underline-width="auto" style:text-underline-color="font-color" fo:font-weight="bold" officeooo:paragraph-rsid="0012376c" fo:background-color="transparent" style:font-size-asian="11pt" style:font-size-complex="11pt"/>
    </style:style>
    <style:style style:name="P14" style:family="paragraph" style:parent-style-name="Table_20_Contents">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5" style:family="paragraph" style:parent-style-name="Table_20_Contents">
      <style:paragraph-properties fo:margin-left="0in" fo:margin-right="0in" fo:margin-top="0in" fo:margin-bottom="0in" style:contextual-spacing="false" fo:line-height="100%" fo:text-indent="0in" style:auto-text-indent="false"/>
      <style:text-properties style:font-name="Helvetica" fo:font-size="11pt" officeooo:paragraph-rsid="0012376c" style:font-size-asian="11pt" style:font-size-complex="11pt"/>
    </style:style>
    <style:style style:name="P16" style:family="paragraph" style:parent-style-name="Table_20_Contents" style:list-style-name="L3">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7" style:family="paragraph" style:parent-style-name="Table_20_Contents" style:list-style-name="L3">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18" style:family="paragraph" style:parent-style-name="Table_20_Contents" style:list-style-name="Numbering_20_abc">
      <loext:graphic-properties draw:fill="none" draw:fill-color="#ffffff"/>
      <style:paragraph-properties fo:margin-top="0in" fo:margin-bottom="0in" style:contextual-spacing="false" fo:line-height="100%" fo:background-color="transparent" fo:padding="0in" fo:border="none" style:writing-mode="lr-tb"/>
      <style:text-properties officeooo:paragraph-rsid="0012376c"/>
    </style:style>
    <style:style style:name="P19" style:family="paragraph" style:parent-style-name="Table_20_Contents">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style:text-underline-style="none" officeooo:paragraph-rsid="0012376c" style:text-blinking="false" fo:background-color="transparent" style:font-size-asian="11pt" style:font-size-complex="11pt"/>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Helvetica" fo:font-size="11pt" officeooo:paragraph-rsid="0013afb0" style:font-size-asian="11pt" style:font-size-complex="11pt"/>
    </style:style>
    <style:style style:name="P21" style:family="paragraph" style:parent-style-name="Text_20_body">
      <style:paragraph-properties fo:margin-left="0in" fo:margin-right="0in" fo:margin-top="0in" fo:margin-bottom="0in" style:contextual-spacing="false" fo:line-height="100%" fo:text-indent="0in" style:auto-text-indent="false" fo:break-before="pag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fo:background-color="transparent" style:font-size-asian="11pt" style:font-size-complex="11pt"/>
    </style:style>
    <style:style style:name="P22" style:family="paragraph" style:parent-style-name="Table_20_Contents">
      <style:paragraph-properties fo:margin-left="0in" fo:margin-right="0in" fo:margin-top="0in" fo:margin-bottom="0in" style:contextual-spacing="false" fo:line-height="100%" fo:text-indent="0in" style:auto-text-indent="false" style:writing-mode="lr-tb"/>
      <style:text-properties fo:font-size="11pt" officeooo:paragraph-rsid="0012376c" style:font-size-asian="11pt" style:font-size-complex="11pt"/>
    </style:style>
    <style:style style:name="P23" style:family="paragraph" style:parent-style-name="Table_20_Contents">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24" style:family="paragraph" style:parent-style-name="Table_20_Contents">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25" style:family="paragraph" style:parent-style-name="Text_20_body" style:list-style-name="L4">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26" style:family="paragraph" style:parent-style-name="Text_20_body" style:list-style-name="L4">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27" style:family="paragraph" style:parent-style-name="Text_20_body" style:list-style-name="L5">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28" style:family="paragraph" style:parent-style-name="Text_20_body" style:list-style-name="L6">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29"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font-name="Helvetica" fo:font-size="11pt" fo:font-style="normal" style:text-underline-style="solid" style:text-underline-width="auto" style:text-underline-color="font-color" fo:font-weight="bold" officeooo:paragraph-rsid="0013afb0" fo:background-color="transparent" style:font-size-asian="11pt" style:font-size-complex="11pt"/>
    </style:style>
    <style:style style:name="P30" style:family="paragraph" style:parent-style-name="Text_20_body" style:list-style-name="L7">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fo:background-color="transparent" style:font-size-asian="11pt" style:font-size-complex="11pt"/>
    </style:style>
    <style:style style:name="P31" style:family="paragraph" style:parent-style-name="Text_20_body" style:list-style-name="L7">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style:font-size-asian="11pt" style:font-size-complex="11pt"/>
    </style:style>
    <style:style style:name="P32" style:family="paragraph" style:parent-style-name="Text_20_body" style:list-style-name="L7">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3afb0" style:font-size-asian="11pt" style:font-size-complex="11pt"/>
    </style:style>
    <style:style style:name="P33"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fo:background-color="transparent" style:font-size-asian="11pt" style:font-size-complex="11pt"/>
    </style:style>
    <style:style style:name="P34" style:family="paragraph" style:parent-style-name="Text_20_body">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style:font-name="Helvetica" fo:font-size="11pt" officeooo:paragraph-rsid="0012376c" style:font-size-asian="11pt" style:font-size-complex="11pt"/>
    </style:style>
    <style:style style:name="P35" style:family="paragraph" style:parent-style-name="Table_20_Contents" style:list-style-name="L8">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36" style:family="paragraph" style:parent-style-name="Text_20_body">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style:font-size-asian="11pt" style:font-size-complex="11pt"/>
    </style:style>
    <style:style style:name="P37" style:family="paragraph" style:parent-style-name="Text_20_body">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bold" officeooo:paragraph-rsid="0012376c" style:text-blinking="false" style:font-size-asian="11pt" style:font-size-complex="11pt"/>
    </style:style>
    <style:style style:name="P38" style:family="paragraph" style:parent-style-name="Text_20_body" style:list-style-name="L9">
      <loext:graphic-properties draw:fill="none" draw:fill-color="#ffffff"/>
      <style:paragraph-properties fo:margin-top="0in" fo:margin-bottom="0in" style:contextual-spacing="false" fo:line-height="100%" fo:background-color="transparent" fo:padding="0in" fo:border="none" style:writing-mode="lr-tb"/>
      <style:text-properties officeooo:paragraph-rsid="0012376c"/>
    </style:style>
    <style:style style:name="P39" style:family="paragraph" style:parent-style-name="Table_20_Contents">
      <style:paragraph-properties fo:margin-left="0in" fo:margin-right="0in" fo:margin-top="0in" fo:margin-bottom="0in" style:contextual-spacing="false" fo:line-height="100%" fo:text-indent="0in" style:auto-text-indent="false" style:writing-mode="lr-tb"/>
      <style:text-properties style:font-name="Helvetica" fo:font-size="11pt" officeooo:paragraph-rsid="0012376c" style:font-size-asian="11pt" style:font-size-complex="11pt"/>
    </style:style>
    <style:style style:name="P40"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ffffff" loext:opacity="100%" style:font-name="Helvetica" fo:font-size="11pt" fo:font-style="normal" style:text-underline-style="solid" style:text-underline-width="auto" style:text-underline-color="font-color" fo:font-weight="bold" officeooo:paragraph-rsid="0013afb0" fo:background-color="transparent" style:font-size-asian="11pt" style:font-size-complex="11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12376c"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 style:family="text">
      <style:text-properties fo:font-weight="bold" fo:background-color="transparent" loext:char-shading-value="0"/>
    </style:style>
    <style:style style:name="T5" style:family="text">
      <style:text-properties fo:background-color="transparent" loext:char-shading-value="0"/>
    </style:style>
    <style:style style:name="T6" style:family="text">
      <style:text-properties fo:font-variant="normal" fo:text-transform="none" fo:color="#000000" loext:opacity="100%" style:text-line-through-style="none" style:text-line-through-type="none" style:font-name="Helvetica"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Helvetica" fo:font-style="normal" style:text-underline-style="none" fo:font-weight="normal" style:text-blinking="false" fo:background-color="transparent" loext:char-shading-value="0"/>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variant="normal" fo:text-transform="none" fo:color="#000000" loext:opacity="100%" style:text-line-through-style="none" style:text-line-through-type="none" style:font-name="Helvetica" fo:font-style="normal" style:text-underline-style="none" fo:font-weight="normal" officeooo:rsid="000fa9be" style:text-blinking="false" fo:background-color="transparent" loext:char-shading-value="0"/>
    </style:style>
    <style:style style:name="T10" style:family="text">
      <style:text-properties officeooo:rsid="0012376c"/>
    </style:style>
    <style:style style:name="T11" style:family="text">
      <style:text-properties fo:font-variant="normal" fo:text-transform="none" fo:color="#000000" loext:opacity="100%" style:text-line-through-style="none" style:text-line-through-type="none" style:font-name="Helvetica" fo:font-style="italic"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Helvetica" fo:font-style="normal" style:text-underline-style="none" fo:font-weight="normal" officeooo:rsid="0016ac45"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Helvetica" fo:font-size="11pt" fo:font-style="normal" style:text-underline-style="none" fo:font-weight="normal" style:text-blinking="false" fo:background-color="transparent" loext:char-shading-value="0" style:font-size-asian="11pt" style:font-size-complex="11pt"/>
    </style:style>
    <style:style style:name="T14" style:family="text">
      <style:text-properties fo:font-variant="normal" fo:text-transform="none" fo:color="#000000" loext:opacity="100%" style:text-line-through-style="none" style:text-line-through-type="none" style:font-name="Helvetica" fo:font-size="11pt" fo:font-style="italic" style:text-underline-style="none" fo:font-weight="normal" style:text-blinking="false" fo:background-color="transparent" loext:char-shading-value="0" style:font-size-asian="11pt" style:font-size-complex="11pt"/>
    </style:style>
    <style:style style:name="T15" style:family="text">
      <style:text-properties fo:font-variant="normal" fo:text-transform="none" fo:color="#000000" loext:opacity="100%" style:text-line-through-style="none" style:text-line-through-type="none" style:font-name="Helvetica" fo:font-style="normal" style:text-underline-style="none" fo:font-weight="normal" officeooo:rsid="0017f825" style:text-blinking="false" fo:background-color="transparent" loext:char-shading-value="0"/>
    </style:style>
    <style:style style:name="T16" style:family="text">
      <style:text-properties fo:font-style="italic" fo:font-weight="normal"/>
    </style:style>
    <style:style style:name="T17" style:family="text">
      <style:text-properties fo:font-variant="normal" fo:text-transform="none" fo:color="#000000" loext:opacity="100%" fo:font-style="normal" style:text-underline-style="solid" style:text-underline-width="auto" style:text-underline-color="font-color" fo:font-weight="normal"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Helvetica" fo:font-style="normal" style:text-underline-style="none" fo:font-weight="normal" officeooo:rsid="000b7923" style:text-blinking="false" fo:background-color="transparent" loext:char-shading-value="0"/>
    </style:style>
    <style:style style:name="T20" style:family="text">
      <style:text-properties officeooo:rsid="0008ee58"/>
    </style:style>
    <style:style style:name="T21" style:family="text">
      <style:text-properties fo:font-variant="normal" fo:text-transform="none" fo:color="#000000" loext:opacity="100%" style:text-line-through-style="none" style:text-line-through-type="none" style:font-name="Helvetica" fo:font-style="normal" style:text-underline-style="none" fo:font-weight="normal" officeooo:rsid="0008ee58" style:text-blinking="false" fo:background-color="transparent" loext:char-shading-value="0"/>
    </style:style>
    <style:style style:name="T22" style:family="text">
      <style:text-properties officeooo:rsid="000b7923"/>
    </style:style>
    <style:style style:name="T23" style:family="text">
      <style:text-properties fo:font-variant="normal" fo:text-transform="none" fo:color="#000000" loext:opacity="100%" style:text-line-through-style="none" style:text-line-through-type="none" fo:font-style="normal" style:text-underline-style="none" fo:font-weight="normal" officeooo:rsid="000d0f14" style:text-blinking="false" fo:background-color="transparent" loext:char-shading-value="0"/>
    </style:style>
    <style:style style:name="T24" style:family="text">
      <style:text-properties fo:font-style="italic" fo:background-color="transparent" loext:char-shading-value="0"/>
    </style:style>
    <style:style style:name="T25" style:family="text">
      <style:text-properties officeooo:rsid="0011a43c"/>
    </style:style>
    <style:style style:name="T26" style:family="text">
      <style:text-properties officeooo:rsid="000db86b"/>
    </style:style>
    <style:style style:name="T27" style:family="text">
      <style:text-properties fo:font-weight="normal" fo:background-color="transparent" loext:char-shading-value="0"/>
    </style:style>
    <style:style style:name="T28" style:family="text">
      <style:text-properties fo:color="#000000" loext:opacity="100%" style:text-line-through-style="none" style:text-line-through-type="none" style:text-underline-style="none" fo:font-weight="normal" style:text-blinking="false"/>
    </style:style>
    <text:list-style style:name="L1">
      <text:list-level-style-bullet text:level="1" text:style-name="Character_5f_20_5f_style" loext:num-list-format="%1%." style:num-suffix="." text:bullet-char="•">
        <style:list-level-properties text:space-before="0.25in" text:min-label-width="0.25in" text:min-label-distance="0.2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2">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3">
      <text:list-level-style-number text:level="1" text:style-name="Character_5f_20_5f_style" loext:num-list-format="%1%." style:num-suffix="." style:num-format="1">
        <style:list-level-properties text:space-before="0.2945in" text:min-label-width="0.1965in"/>
      </text:list-level-style-number>
      <text:list-level-style-number text:level="2" text:style-name="Character_5f_20_5f_style" loext:num-list-format="%2%." style:num-suffix="." style:num-format="1">
        <style:list-level-properties text:space-before="0.7854in" text:min-label-width="0.1965in"/>
      </text:list-level-style-number>
      <text:list-level-style-number text:level="3" text:style-name="Character_5f_20_5f_style" loext:num-list-format="%3%." style:num-suffix="." style:num-format="1">
        <style:list-level-properties text:space-before="1.2764in" text:min-label-width="0.1965in"/>
      </text:list-level-style-number>
      <text:list-level-style-number text:level="4" text:style-name="Character_5f_20_5f_style" loext:num-list-format="%4%." style:num-suffix="." style:num-format="1">
        <style:list-level-properties text:space-before="1.7673in" text:min-label-width="0.1965in"/>
      </text:list-level-style-number>
      <text:list-level-style-number text:level="5" text:style-name="Character_5f_20_5f_style" loext:num-list-format="%5%." style:num-suffix="." style:num-format="1">
        <style:list-level-properties text:space-before="2.2583in" text:min-label-width="0.1965in"/>
      </text:list-level-style-number>
      <text:list-level-style-number text:level="6" text:style-name="Character_5f_20_5f_style" loext:num-list-format="%6%." style:num-suffix="." style:num-format="1">
        <style:list-level-properties text:space-before="2.7492in" text:min-label-width="0.1965in"/>
      </text:list-level-style-number>
      <text:list-level-style-number text:level="7" text:style-name="Character_5f_20_5f_style" loext:num-list-format="%7%." style:num-suffix="." style:num-format="1">
        <style:list-level-properties text:space-before="3.2402in" text:min-label-width="0.1965in"/>
      </text:list-level-style-number>
      <text:list-level-style-number text:level="8" text:style-name="Character_5f_20_5f_style" loext:num-list-format="%8%." style:num-suffix="." style:num-format="1">
        <style:list-level-properties text:space-before="3.7315in" text:min-label-width="0.1965in"/>
      </text:list-level-style-number>
      <text:list-level-style-number text:level="9" text:style-name="Character_5f_20_5f_style" loext:num-list-format="%9%." style:num-suffix="." style:num-format="1">
        <style:list-level-properties text:space-before="4.2224in" text:min-label-width="0.1965in"/>
      </text:list-level-style-number>
      <text:list-level-style-number text:level="10" text:style-name="Character_5f_20_5f_style" loext:num-list-format="%10%." style:num-suffix="." style:num-format="1">
        <style:list-level-properties text:space-before="4.7134in" text:min-label-width="0.1965in"/>
      </text:list-level-style-number>
    </text:list-style>
    <text:list-style style:name="L4">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5">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6">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7">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8">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Emergency </text:span><text:span text:style-name="T2">Radio 101</text:span></text:h>
      <text:p text:style-name="P2"/>
      <text:p text:style-name="P2"/>
      <text:p text:style-name="P2"/>
      <text:p text:style-name="P2"/>
      <text:h text:style-name="P3" text:outline-level="3">Introduction</text:h>
      <text:p text:style-name="P4">Maybe you want to be able to talk to your friends on a camping trip. Or maybe you want to be prepared for a natural disaster. No matter the reason, if you’re interested in radio communications, this document is the place to start. Let's begin by looking at these two types of HT (“handie talkie”) radios.</text:p>
      <text:p text:style-name="P5"/>
      <text:p text:style-name="P5"/>
      <text:h text:style-name="P3" text:outline-level="3">Two Useful Types of Handheld Radio: GMRS &amp; Amateur Radio (Ham radio)</text:h>
      <text:p text:style-name="P6"><text:span text:style-name="T3">GMRS</text:span><text:span text:style-name="T2">, or “General Mobile Radio Service”, radios are:</text:span></text:p>
      <text:list text:style-name="L1">
        <text:list-item>
          <text:p text:style-name="P7"><text:span text:style-name="T4">Simple to Use</text:span><text:span text:style-name="T5">: They work just like walkie talkies.</text:span></text:p>
        </text:list-item>
        <text:list-item>
          <text:p text:style-name="P8"><text:span text:style-name="T6">License “Required”: </text:span><text:span text:style-name="T7">Anyone can buy a GMRS, but you’re supposed to have a license to use one.</text:span></text:p>
          <text:list>
            <text:list-item>
              <text:p text:style-name="P9">The FCC seemingly never enforces this requirement. (This is not legal advice.)</text:p>
            </text:list-item>
            <text:list-item>
              <text:p text:style-name="P9">The license is $35, there’s no test, it lasts 10 years, and covers everyone in your family.</text:p>
            </text:list-item>
            <text:list-item>
              <text:p text:style-name="P9">Google “how to get a GMRS license” to find the link to get your license, if you so choose.</text:p>
            </text:list-item>
          </text:list>
        </text:list-item>
        <text:list-item>
          <text:p text:style-name="P7"><text:span text:style-name="T4">30 Channels:</text:span><text:span text:style-name="T5"> Channels above 22 are used for repeaters (see below).</text:span></text:p>
        </text:list-item>
        <text:list-item>
          <text:p text:style-name="P7"><text:span text:style-name="T4">Pretty Cheap</text:span><text:span text:style-name="T5">: GMRS radios start around $30. Find good recs at </text:span><text:span text:style-name="T8">www.genoak.org/radios</text:span></text:p>
        </text:list-item>
      </text:list>
      <text:p text:style-name="P5"/>
      <text:p text:style-name="P6"><text:span text:style-name="T3">Amateur, </text:span><text:span text:style-name="T2">or “Ham”, radios are:</text:span></text:p>
      <text:list text:style-name="L2">
        <text:list-item>
          <text:p text:style-name="P10"><text:span text:style-name="T4">Complex:</text:span><text:span text:style-name="T5"> Ham radios are more complicated to use than GMRS radios.</text:span></text:p>
        </text:list-item>
        <text:list-item>
          <text:p text:style-name="P10"><text:span text:style-name="T4">License Required: </text:span><text:span text:style-name="T5">Anyone can buy a Ham radio, but to transmit, the FCC requires you to get a license, and that requires passing a test. More details on Ham licensing below!</text:span></text:p>
        </text:list-item>
        <text:list-item>
          <text:p text:style-name="P10"><text:span text:style-name="T4">Frequencies, Not Channels: </text:span><text:span text:style-name="T5">Ham radios can transmit and receive on a wide range of frequencies.</text:span></text:p>
          <text:list>
            <text:list-item>
              <text:p text:style-name="P11">Ham radios and GMRS operate on different frequencies.</text:p>
            </text:list-item>
          </text:list>
        </text:list-item>
        <text:list-item>
          <text:p text:style-name="P10"><text:span text:style-name="T4">Range of Prices: </text:span><text:span text:style-name="T5">$20 for a passable HT, $100 for a good one, up to $500+ for a feature rich one.</text:span></text:p>
        </text:list-item>
      </text:list>
      <text:p text:style-name="P5"/>
      <text:p text:style-name="P5"/>
      <text:h text:style-name="P3" text:outline-level="3">Range, Antennas and You</text:h>
      <text:p text:style-name="P4">Your GMRS radio will have much less range than advertised – basically line of sight. You’ll get the longest range from a high point (“Height is might”) with no obstructions, and shortest when the path between you and the other person is blocked by metal or earth. In urban areas, that may be a few blocks or less. A Ham HT should perform better, but still won’t go miles in normal conditions.</text:p>
      <text:p text:style-name="P5"/>
      <text:p text:style-name="P4">Whether you buy a GRMS or Ham HT, one of the first things you’ll want to do is buy a new antenna for it. The antenna is the single piece of equipment that makes the biggest difference for range. Look online for recommendations – some are elastic and can be twisted in a circle to save space, some are simply longer than the stock “rubber duck” antenna that comes with your radio. (Check the antenna connector on your radio to make sure you buy one that’s compatible.)</text:p>
      <text:p text:style-name="P4"/>
      <text:p text:style-name="P12"><text:span text:style-name="T7">Finally, if you’re having range trouble, try moving yourself. Go upstairs, walk around outside, and see if that doesn’t </text:span><text:span text:style-name="T9">help</text:span><text:span text:style-name="T7">. Experimentation is part of the fun of radio!</text:span></text:p>
      <text:p text:style-name="P13"/>
      <text:h text:style-name="P3" text:outline-level="3">Emergency Preparedness Considerations</text:h>
      <text:p text:style-name="P4">If you are interested in emergency communications, here’s more features to look for:</text:p>
      <text:p text:style-name="P4">Ruggedness<text:tab/><text:tab/><text:tab/>Ability to charge via USB-C<text:tab/><text:tab/>Ease of use</text:p>
      <text:p text:style-name="P4">Water resistance<text:tab/><text:tab/><text:span text:style-name="T10">P</text:span>rice of extra batteries <text:span text:style-name="T10">(if any)<text:tab/><text:tab/></text:span>Built-in GPS</text:p>
      <table:table table:name="Table1" table:style-name="Table1">
        <table:table-column table:style-name="Table1.A"/>
        <text:soft-page-break/>
        <table:table-row>
          <table:table-cell table:style-name="Table1.A1" office:value-type="string">
            <text:h text:style-name="P3" text:outline-level="3">Radio Etiquette</text:h>
            <text:p text:style-name="P14">Communicating via radio is different from talking on the phone. You don’t necessarily know if the person you want to talk to is within range to hear you, or for you to hear them. And two people can’t talk at the same time on the same frequency. As a result, there’s something called “radio etiquette” that helps people communicate effectively by radio. Here’s one common variation:</text:p>
            <text:p text:style-name="P15"/>
            <text:list xml:id="list2296822920" text:style-name="L3">
              <text:list-item>
                <text:p text:style-name="P16">Listen and wait for a pause in radio traffic before talking. (transmitting)</text:p>
              </text:list-item>
              <text:list-item>
                <text:p text:style-name="P17"><text:span text:style-name="T7">Hold down the push-to-talk (PTT) button and </text:span><text:span text:style-name="T11">wait 1 second</text:span><text:span text:style-name="T7"> because </text:span><text:span text:style-name="T12">your radio’s</text:span><text:span text:style-name="T7"> transmitter may take that long to kick in.</text:span></text:p>
              </text:list-item>
            </text:list>
            <text:list xml:id="list4142888366" text:style-name="Numbering_20_abc">
              <text:list-item>
                <text:list>
                  <text:list-item>
                    <text:p text:style-name="P18"><text:span text:style-name="T13">Hold down the PTT button firmly for as long as you are speaking.</text:span></text:p>
                  </text:list-item>
                  <text:list-item>
                    <text:p text:style-name="P18"><text:span text:style-name="T13">No one else can transmit while you are transmitting, so…</text:span></text:p>
                  </text:list-item>
                  <text:list-item>
                    <text:p text:style-name="P18"><text:span text:style-name="T13">Keep transmissions short and to the point. Say one thing only each time you transmit. </text:span><text:span text:style-name="T14">Don’t ramble</text:span><text:span text:style-name="T13">.</text:span></text:p>
                  </text:list-item>
                  <text:list-item>
                    <text:p text:style-name="P18"><text:span text:style-name="T13">Say your callsign at the end of the transmission (or a series of transmissions), and again after 15 minutes, and every 15 minutes thereafter if still talking.</text:span></text:p>
                  </text:list-item>
                </text:list>
              </text:list-item>
            </text:list>
            <text:list xml:id="list150656258359136" text:continue-list="list2296822920" text:style-name="L3">
              <text:list-item>
                <text:p text:style-name="P16">If you are calling a specific person, say their name 2-3 times, and then your own name and call sign. (if you have one)</text:p>
              </text:list-item>
              <text:list-item>
                <text:p text:style-name="P16">When you are done, say "over" to indicate the other side can talk.</text:p>
              </text:list-item>
              <text:list-item>
                <text:p text:style-name="P17"><text:span text:style-name="T7">To break into a conversation, wait for a break and say "break" and then your name or </text:span><text:span text:style-name="T15">callsign</text:span><text:span text:style-name="T7">.</text:span></text:p>
              </text:list-item>
            </text:list>
            <text:list xml:id="list150656576974790" text:continue-list="list4142888366" text:style-name="Numbering_20_abc">
              <text:list-item>
                <text:list>
                  <text:list-item text:start-value="1">
                    <text:p text:style-name="P18"><text:span text:style-name="T13">Say “priority” if what you have to say is urgent, “emergency” if it’s an emergency.</text:span></text:p>
                  </text:list-item>
                </text:list>
              </text:list-item>
            </text:list>
            <text:list xml:id="list150656274895154" text:continue-list="list150656258359136" text:style-name="L3">
              <text:list-item>
                <text:p text:style-name="P16">Acknowledge the other side's transmission with "Copy” or “Roger”.</text:p>
              </text:list-item>
            </text:list>
            <text:list text:continue-list="list150656576974790" text:style-name="Numbering_20_abc">
              <text:list-item>
                <text:list>
                  <text:list-item text:start-value="1">
                    <text:p text:style-name="P18"><text:span text:style-name="T13">Avoid jargon or code words (including CB lingo) until you know what they mean, and so does whoever you’re talking to.</text:span></text:p>
                  </text:list-item>
                </text:list>
              </text:list-item>
            </text:list>
            <text:list text:continue-list="list150656274895154" text:style-name="L3">
              <text:list-item>
                <text:p text:style-name="P16">When your conversation is over, say your handle and then "clear" to indicate that you're leaving the channel open for others to use.</text:p>
              </text:list-item>
            </text:list>
            <text:p text:style-name="P15"/>
            <text:p text:style-name="P15"/>
            <text:h text:style-name="P3" text:outline-level="3">Example of Radio Etiquette</text:h>
            <text:p text:style-name="P19">“<text:span text:style-name="T16">Luke, Luke, Luke – this is Leia Z9ABC – do you hear me? Over.”</text:span></text:p>
            <text:p text:style-name="P19">“<text:span text:style-name="T16">Leia, this is Luke X7QRS. I hear you. Who is my father? Over.”</text:span></text:p>
            <text:p text:style-name="P19">“<text:span text:style-name="T16">Luke, you don’t really want to know. Leia, clear. Z9ABC.”</text:span></text:p>
            <text:p text:style-name="P19">“<text:span text:style-name="T16">Copy, Leia. Luke, clear. X7QRS.”</text:span></text:p>
          </table:table-cell>
        </table:table-row>
      </table:table>
      <text:p text:style-name="P6"/>
      <text:p text:style-name="P6"/>
      <text:h text:style-name="P3" text:outline-level="3">Repeaters</text:h>
      <text:p text:style-name="P4">A repeater is basically a radio that receives transmissions on one frequency and automatically retransmits them on another. They’re usually installed on top of buildings or mountains (height is might!) or in other places that can extend your range from a few miles to tens, or even hundreds, of miles.</text:p>
      <text:p text:style-name="P5"/>
      <text:p text:style-name="P4">Both Ham and GMRS repeaters exist, but GMRS repeaters are considerably more limited in what they can do. But because it’s so much easier to get a GMRS license, communities are setting up GMRS repeaters to support people in emergencies. </text:p>
      <text:p text:style-name="P5"/>
      <text:p text:style-name="P6"><text:span text:style-name="T2">Some repeaters are specifically for emergency preparedness. In Oakland, GMRS radios can use the GENOAK (</text:span><text:span text:style-name="T17">www.genoak.org</text:span><text:span text:style-name="T2">) repeater. Hams can use the ORCA (</text:span><text:span text:style-name="T17">www.ww6or.com</text:span><text:span text:style-name="T2">) repeater. Most critical traffic will probably go through Ham repeaters. </text:span></text:p>
      <text:p text:style-name="P5"/>
      <text:p text:style-name="P20"><text:span text:style-name="T2">With computer software like Chirp and </text:span><text:span text:style-name="T17">www.Repeaterbook.com</text:span><text:span text:style-name="T18"> </text:span><text:span text:style-name="T2">(for finding your local repeaters), you can set up your radio for repeater use in just a few minutes.</text:span></text:p>
      <text:p text:style-name="P21"/>
      <table:table table:name="Table3" table:style-name="Table3">
        <table:table-column table:style-name="Table3.A"/>
        <table:table-row>
          <table:table-cell table:style-name="Table3.A1" office:value-type="string">
            <text:h text:style-name="P3" text:outline-level="3" text:is-list-header="true">Why Bother Getting Your Ham License?</text:h>
            <text:p text:style-name="P13"/>
            <text:p text:style-name="P22"><text:span text:style-name="T7">You’re unlikely to be harassed for </text:span><text:span text:style-name="T19">hot having</text:span><text:span text:style-name="T7"> a license in a crisis. So why get one?</text:span></text:p>
            <text:p text:style-name="P23"><text:span text:style-name="T20">1. </text:span>Comms is hard to get right, especially when you’re under pressure.</text:p>
            <text:p text:style-name="P24"><text:span text:style-name="T21">2. </text:span><text:span text:style-name="T7">The only way to learn is by practicing with the Ham community.</text:span></text:p>
            <text:p text:style-name="P23"><text:span text:style-name="T20">3. </text:span><text:span text:style-name="T22">Without</text:span> a call sign, no one will talk to you, so you won’t get any practice.</text:p>
            <text:p text:style-name="P23"><text:span text:style-name="T20">4. </text:span>Finally, it’s cheap, fast, easy, and the law. (if you care about such things)</text:p>
          </table:table-cell>
        </table:table-row>
      </table:table>
      <text:h text:style-name="P3" text:outline-level="3"/>
      <text:h text:style-name="P3" text:outline-level="3"/>
      <text:h text:style-name="P3" text:outline-level="3">The Three Ham License Classes</text:h>
      <text:p text:style-name="P6"><text:span text:style-name="T2">You must pass the </text:span><text:span text:style-name="T3">technician</text:span><text:span text:style-name="T18"> </text:span><text:span text:style-name="T2">exam for the first Ham license.</text:span></text:p>
      <text:list text:style-name="L4">
        <text:list-item>
          <text:p text:style-name="P25">The exam has 35 multiple-choice questions out of 412 total questions.</text:p>
        </text:list-item>
        <text:list-item>
          <text:p text:style-name="P25">You pay about $10 to take it online, and $35 for your license if you pass.</text:p>
        </text:list-item>
        <text:list-item>
          <text:p text:style-name="P25">You get a 10-year license, call sign, and can legally transmit on most of the VHF/UHF bands and a very limited portion of the HF (high frequency) band.</text:p>
          <text:list>
            <text:list-item>
              <text:p text:style-name="P26"><text:span text:style-name="T7">HF can transmit hundreds </text:span><text:span text:style-name="T19">to</text:span><text:span text:style-name="T7"> thousands of miles without a repeater.</text:span></text:p>
            </text:list-item>
          </text:list>
        </text:list-item>
      </text:list>
      <text:p text:style-name="P5"/>
      <text:p text:style-name="P6"><text:span text:style-name="T23">T</text:span><text:span text:style-name="T2">he second exam </text:span><text:span text:style-name="T23">is</text:span><text:span text:style-name="T2"> your </text:span><text:span text:style-name="T3">general</text:span><text:span text:style-name="T18"> </text:span><text:span text:style-name="T2">license, and access to many more HF frequencies.</text:span></text:p>
      <text:list text:style-name="L5">
        <text:list-item>
          <text:p text:style-name="P27">It’s the same number of questions as technician – and not much harder.</text:p>
        </text:list-item>
        <text:list-item>
          <text:p text:style-name="P27">You can use almost all Ham frequencies if you pass.</text:p>
        </text:list-item>
        <text:list-item>
          <text:p text:style-name="P27">You can volunteer to help administer technician exams.</text:p>
        </text:list-item>
      </text:list>
      <text:p text:style-name="P5"/>
      <text:p text:style-name="P6"><text:span text:style-name="T23">T</text:span><text:span text:style-name="T2">he third and final exam </text:span><text:span text:style-name="T23">is</text:span><text:span text:style-name="T2"> your </text:span><text:span text:style-name="T3">amateur extra</text:span><text:span text:style-name="T18"> </text:span><text:span text:style-name="T2">license and the most privileges.</text:span></text:p>
      <text:list text:style-name="L6">
        <text:list-item>
          <text:p text:style-name="P28">The exam has 50 multiple-choice questions out of a pool of 700 total questions. It’s challenging!</text:p>
        </text:list-item>
        <text:list-item>
          <text:p text:style-name="P28">You can use all Ham frequencies with your extra license!</text:p>
        </text:list-item>
        <text:list-item>
          <text:p text:style-name="P28">You can also administer all Ham exams, including the amateur extra.</text:p>
        </text:list-item>
      </text:list>
      <text:p text:style-name="P5"/>
      <text:p text:style-name="P5"/>
      <text:h text:style-name="P3" text:outline-level="3">Study Tips for Your Ham License(s)</text:h>
      <text:p text:style-name="P6"><text:span text:style-name="T2">The single best resource for studying for your license may be </text:span><text:span text:style-name="T17">www.hamstudy.org</text:span><text:span text:style-name="T2">. And Craig Buck’s “All Ham No Spam” is a great book series to study with. Remember, you’re just studying to pass the test. You’ll actually learn to use Ham radio by getting on the air. (more below)</text:span></text:p>
      <text:p text:style-name="P5"/>
      <text:p text:style-name="P5"/>
      <text:h text:style-name="P29" text:outline-level="3">Ham Radio Culture and Expectations</text:h>
      <text:list text:style-name="L7">
        <text:list-item>
          <text:p text:style-name="P30">Ham radio is primarily intended for individual amateur operators to talk to each other.</text:p>
          <text:list>
            <text:list-item>
              <text:p text:style-name="P31"><text:span text:style-name="T5">This is distinct from </text:span><text:span text:style-name="T24">broadcast</text:span><text:span text:style-name="T5"> radio, which is intended for the general public. The FCC regulates both Ham and broadcast radio.</text:span></text:p>
            </text:list-item>
            <text:list-item>
              <text:p text:style-name="P30">Hams therefore can’t legally play music or broadcast news, etc.</text:p>
            </text:list-item>
          </text:list>
        </text:list-item>
        <text:list-item>
          <text:p text:style-name="P32"><text:span text:style-name="T7">Encryption, including speaking in code, is forbidden because it may </text:span><text:span text:style-name="T19">hide</text:span><text:span text:style-name="T7"> criminal activity</text:span></text:p>
          <text:list>
            <text:list-item>
              <text:p text:style-name="P30">And if used during disasters, it can obscure what’s happening.</text:p>
            </text:list-item>
          </text:list>
        </text:list-item>
        <text:list-item>
          <text:p text:style-name="P30">Ham radio is largely self-regulating. Hams will tell you (on air!) when you break the rules.</text:p>
        </text:list-item>
        <text:list-item>
          <text:p text:style-name="P30"><text:span text:style-name="T7">It’s normal for Hams to tell you, on air, where you are transmitting from.</text:span></text:p>
        </text:list-item>
      </text:list>
      <text:h text:style-name="P33" text:outline-level="3"><text:span text:style-name="T7"/></text:h>
      <text:p text:style-name="P34"/>
      <table:table table:name="Table4" table:style-name="Table4">
        <table:table-column table:style-name="Table4.A"/>
        <table:table-row>
          <table:table-cell table:style-name="Table4.A1" office:value-type="string">
            <text:h text:style-name="P3" text:outline-level="3">More Licensing Considerations</text:h>
            <text:list text:style-name="L8">
              <text:list-item>
                <text:p text:style-name="P35">You must begin every transmission with your callsign – it’s publicly searchable and ID’s you.</text:p>
              </text:list-item>
              <text:list-item>
                <text:p text:style-name="P35">Your legal name and address are visible online via your callsign.</text:p>
              </text:list-item>
              <text:list-item>
                <text:p text:style-name="P35">Consider a PO Box or community center address on your FC<text:span text:style-name="T25">C </text:span>application</text:p>
              </text:list-item>
              <text:list-item>
                <text:p text:style-name="P35">If you have a felony conviction, you must explain it to get your license.</text:p>
              </text:list-item>
              <text:list-item>
                <text:p text:style-name="P35"><text:span text:style-name="T26">A</text:span>bout 80% of people who explain their conviction get their license.</text:p>
              </text:list-item>
            </text:list>
          </table:table-cell>
        </table:table-row>
      </table:table>
      <text:h text:style-name="P3" text:outline-level="3"><text:soft-page-break/>Radio Clubs</text:h>
      <text:p text:style-name="P4">There are Ham radio clubs in practically every community. They typically meet about once a month and host workshops, license study sessions, exams and more. Members sell used equipment to each other at a discount. They also often have their own repeaters and host their own weekly on-air meetings (“nets”) where you can practice transmitting on your radio in a structured environment.</text:p>
      <text:p text:style-name="P5"/>
      <text:p text:style-name="P5"/>
      <text:h text:style-name="P3" text:outline-level="3">Mobile Radios and Base Stations</text:h>
      <text:p text:style-name="P4">This handout is focused on HTs, but there are other options out there, too. Mobile radios are designed to go in your car or boat. They look like car stereos and can transmit at higher power, usually up to 50 watts, and use external antennas mounted on your vehicle.</text:p>
      <text:p text:style-name="P5"/>
      <text:p text:style-name="P4">Base stations are installed more or less permanently in your home (or “shack”). They’re usually reserved for HF (high frequency) Ham radios, which can transmit thousands of miles by bouncing their signals off the atmosphere. These go up to 100 watts of transmitting power or more, and can have huge external antennas. You can set up a GMRS radio in your base station, too.</text:p>
      <text:p text:style-name="P4"/>
      <text:p text:style-name="P5"/>
      <text:h text:style-name="P3" text:outline-level="3">Other Radio Technologies</text:h>
      <text:p text:style-name="P4">There are many other types of comms that may be of interest to you. Here are a few:</text:p>
      <text:p text:style-name="P4"/>
      <text:p text:style-name="P36"><text:span text:style-name="T4">Digital modes</text:span><text:span text:style-name="T5">: Send GPS coordinates, email, pictures, and <text:s/>text messages over Ham radio!</text:span></text:p>
      <text:p text:style-name="P36"><text:span text:style-name="T4">Meshtastic devices</text:span><text:span text:style-name="T5">: Send text messages over the air – no internet or Ham license required.</text:span></text:p>
      <text:p text:style-name="P37"><text:span text:style-name="T5">SDR</text:span><text:span text:style-name="T27">: Software defined radio. Use a USB dongle to listen to transmissions all over the spectrum.</text:span></text:p>
      <text:list text:style-name="L9">
        <text:list-item>
          <text:p text:style-name="P38"><text:span text:style-name="T13">There are also SDR websites that let you listen to local transmissions around the world!</text:span></text:p>
        </text:list-item>
      </text:list>
      <text:p text:style-name="P36"><text:span text:style-name="T4">Business license</text:span><text:span text:style-name="T5">: Use encryption on the radio with this one! Only for incorporated entities.</text:span></text:p>
      <text:p text:style-name="P36"><text:span text:style-name="T4">AREDN (“are-den”)</text:span><text:span text:style-name="T5">: A high speed data network over Ham frequencies for use in emergencies.</text:span></text:p>
      <text:p text:style-name="P5"/>
      <text:p text:style-name="P5"/>
      <table:table table:name="Table5" table:style-name="Table5">
        <table:table-column table:style-name="Table5.A"/>
        <table:table-column table:style-name="Table5.B"/>
        <table:table-row>
          <table:table-cell table:style-name="Table5.A1" office:value-type="string">
            <text:h text:style-name="P3" text:outline-level="3">More Resources</text:h>
            <text:p text:style-name="P14">ARRL Handbook</text:p>
            <text:p text:style-name="P14">GENOAK</text:p>
            <text:p text:style-name="P14">Ham Radio Crash Course</text:p>
            <text:p text:style-name="P14">UtahSDR</text:p>
            <text:p text:style-name="P39"/>
            <text:p text:style-name="P39"/>
          </table:table-cell>
          <table:table-cell table:style-name="Table5.A1" office:value-type="string">
            <text:h text:style-name="P40" text:outline-level="3"><text:span text:style-name="T28">Pride Radio Group</text:span>More Resources</text:h>
            <text:p text:style-name="P14">Young Amateur Radio Club</text:p>
            <text:p text:style-name="P14">YLRL (Young Ladies Radio League)</text:p>
            <text:p text:style-name="P14">OMIK (historically Black radio association)</text:p>
            <text:p text:style-name="P39"><text:span text:style-name="T17"/></text:p>
          </table:table-cell>
        </table:table-row>
      </table:table>
      <text:h text:style-name="P3" text:outline-level="3">Now Get on the Air!</text:h>
      <text:p text:style-name="P4">The best way to learn radio is by doing. The easiest way to get on the air is to get a few cheap walkie talkies you have lying around, go to the park with some friends, and practice radio etiquette together. You could also buy some GMRS units to use on your next multi-car road trip.</text:p>
      <text:p text:style-name="P5"/>
      <text:p text:style-name="P4">If you’re ready to take things to the next level, organize some of your neighbors to all get your technician license together. Then buy your first Ham HTs and schedule a weekly net so you can practice your skills. Whatever you do, you’ll have fun and be better prepared for your next camping trip or natural disaster. Good lu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haracter_5f_20_5f_style" style:display-name="Character_20_style" style:family="text">
      <style:text-properties style:font-name="Helvetica" fo:font-family="Helvetica" style:font-family-generic="swiss" style:font-pitch="variable" fo:font-size="9pt" style:font-size-asian="7.84999990463257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7T14:46:00.238597000</meta:creation-date>
    <dc:date>2026-05-27T15:06:55.094074000</dc:date>
    <meta:editing-duration>PT10M36S</meta:editing-duration>
    <meta:editing-cycles>1</meta:editing-cycles>
    <meta:document-statistic meta:table-count="4" meta:image-count="0" meta:object-count="0" meta:page-count="4" meta:paragraph-count="112" meta:word-count="1942" meta:character-count="10987" meta:non-whitespace-character-count="9190"/>
    <meta:generator>LibreOffice/26.2.2.2$MacOSX_X86_64 LibreOffice_project/1f77d10d6938fd34972958f64b2bcfa54f8b1ba5</meta:generator>
  </office:meta>
</office:document-meta>
</file>